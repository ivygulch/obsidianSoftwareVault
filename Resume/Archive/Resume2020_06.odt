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df"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2pt" officeooo:rsid="00159688" officeooo:paragraph-rsid="00159688" style:font-size-asian="12pt" style:font-size-complex="12pt"/>
    </style:style>
    <style:style style:name="P2" style:family="paragraph" style:parent-style-name="Standard">
      <style:paragraph-properties fo:line-height="100%"/>
      <style:text-properties fo:font-size="12pt" style:font-size-asian="12pt" style:font-size-complex="12pt"/>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paragraph-properties fo:line-height="100%"/>
      <style:text-properties fo:font-size="12pt" fo:font-weight="bold" style:font-size-asian="12pt" style:font-weight-asian="bold" style:font-size-complex="12pt" style:font-weight-complex="bold"/>
    </style:style>
    <style:style style:name="P5" style:family="paragraph" style:parent-style-name="Standard">
      <style:paragraph-properties fo:line-height="0.1in"/>
      <style:text-properties fo:font-size="12pt" fo:font-weight="bold" style:font-size-asian="12pt" style:font-weight-asian="bold" style:font-size-complex="12pt" style:font-weight-complex="bold"/>
    </style:style>
    <style:style style:name="P6" style:family="paragraph" style:parent-style-name="Footer">
      <style:paragraph-properties fo:text-align="center" style:justify-single-word="false"/>
    </style:style>
    <style:style style:name="P7"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8"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officeooo:paragraph-rsid="00148e97" style:font-size-asian="12pt" style:font-weight-asian="bold" style:font-size-complex="12pt" style:font-weight-complex="bold"/>
    </style:style>
    <style:style style:name="P9" style:family="paragraph" style:parent-style-name="Standard">
      <style:paragraph-properties fo:margin-left="1.5in" fo:margin-right="0in" fo:line-height="0.1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10" style:family="paragraph" style:parent-style-name="Standard">
      <style:paragraph-properties fo:margin-left="1.5in" fo:margin-right="0in" fo:line-height="0.1in" fo:text-indent="-1.5in" style:auto-text-indent="false">
        <style:tab-stops>
          <style:tab-stop style:position="-1.1252in"/>
          <style:tab-stop style:position="-1in"/>
          <style:tab-stop style:position="-0.5in"/>
        </style:tab-stops>
      </style:paragraph-properties>
      <style:text-properties fo:font-size="12pt" fo:font-weight="bold" officeooo:paragraph-rsid="00148e97" style:font-size-asian="12pt" style:font-weight-asian="bold" style:font-size-complex="12pt" style:font-weight-complex="bold"/>
    </style:style>
    <style:style style:name="P11"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style>
    <style:style style:name="P12"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officeooo:paragraph-rsid="00148e97"/>
    </style:style>
    <style:style style:name="P13" style:family="paragraph" style:parent-style-name="Standard">
      <style:paragraph-properties fo:margin-left="1.5in" fo:margin-right="0in" fo:text-indent="-1.5in" style:auto-text-indent="false" fo:break-before="page">
        <style:tab-stops>
          <style:tab-stop style:position="-1.1252in"/>
          <style:tab-stop style:position="-1in"/>
          <style:tab-stop style:position="-0.5in"/>
        </style:tab-stops>
      </style:paragraph-properties>
      <style:text-properties fo:font-size="12pt" fo:font-weight="bold" officeooo:paragraph-rsid="00148e97" style:font-size-asian="12pt" style:font-weight-asian="bold" style:font-size-complex="12pt" style:font-weight-complex="bold"/>
    </style:style>
    <style:style style:name="P14" style:family="paragraph" style:parent-style-name="Standard">
      <style:paragraph-properties fo:margin-left="2.5in" fo:margin-right="0in" fo:line-height="100%" fo:text-indent="-2.5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5" style:family="paragraph" style:parent-style-name="_32_Definitions">
      <style:paragraph-properties fo:text-align="start" style:justify-single-word="false"/>
    </style:style>
    <style:style style:name="P16" style:family="paragraph" style:parent-style-name="_32_Definitions">
      <style:paragraph-properties fo:text-align="start" style:justify-single-word="false"/>
      <style:text-properties officeooo:paragraph-rsid="00148e97"/>
    </style:style>
    <style:style style:name="P17" style:family="paragraph" style:parent-style-name="_32_Definitions">
      <style:paragraph-properties fo:line-height="100%" fo:text-align="start" style:justify-single-word="false"/>
    </style:style>
    <style:style style:name="P18" style:family="paragraph" style:parent-style-name="_32_Definitions">
      <style:paragraph-properties fo:text-align="start" style:justify-single-word="false"/>
      <style:text-properties fo:font-size="12pt" fo:font-weight="bold" style:font-size-asian="12pt" style:font-weight-asian="bold" style:font-size-complex="12pt" style:font-weight-complex="bold"/>
    </style:style>
    <style:style style:name="P19" style:family="paragraph" style:parent-style-name="Standard">
      <style:paragraph-properties fo:line-height="100%" fo:break-before="page"/>
      <style:text-properties fo:font-size="12pt" fo:font-weight="bold" style:font-size-asian="12pt" style:font-weight-asian="bold" style:font-size-complex="12pt" style:font-weight-complex="bold"/>
    </style:style>
    <style:style style:name="P20"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style>
    <style:style style:name="P21"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fo:font-size="12pt" style:font-size-asian="12pt" style:font-size-complex="12pt"/>
    </style:style>
    <style:style style:name="P22" style:family="paragraph" style:parent-style-name="Standard">
      <style:paragraph-properties fo:margin-left="0in" fo:margin-right="0in" fo:line-height="100%"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23"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officeooo:paragraph-rsid="0017197b"/>
    </style:style>
    <style:style style:name="P24" style:family="paragraph" style:parent-style-name="Standard" style:master-page-name="Standard">
      <style:paragraph-properties style:page-number="auto">
        <style:tab-stops>
          <style:tab-stop style:position="6.5in" style:type="right"/>
        </style:tab-stops>
      </style:paragraph-properties>
    </style:style>
    <style:style style:name="P25" style:family="paragraph" style:parent-style-name="Standard" style:master-page-name="Standard">
      <style:paragraph-properties style:page-number="auto"/>
      <style:text-properties fo:font-size="12pt" fo:font-weight="bold" style:font-size-asian="12pt" style:font-weight-asian="bold" style:font-size-complex="12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officeooo:rsid="00148e97"/>
    </style:style>
    <style:style style:name="T5" style:family="text">
      <style:text-properties officeooo:rsid="00159688"/>
    </style:style>
    <style:style style:name="T6" style:family="text">
      <style:text-properties officeooo:rsid="001719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ummary <text:toc-mark text:string-value="Summary " text:outline-level="3"/></text:p>
      <text:p text:style-name="P5"/>
      <text:p text:style-name="P15">Experienced software craftsman with a strong background in iOS and distributed, <text:span text:style-name="T6">reactive </text:span>system design and development.</text:p>
      <text:p text:style-name="P5"/>
      <text:p text:style-name="P15">Rapid problem analysis with the ability to work with clients and end users in developing and refining requirements. Good grasp of how each piece fits in with client's overall goals and needs and help them balance technical excellence with business objectives. Experienced and comfortable with agile development methods. Ability to learn and integrate new techniques, tools, and skills quickly.<text:span text:style-name="T3"> </text:span>Able to mentor and assist development team members in developing their skills.</text:p>
      <text:p text:style-name="P18"/>
      <text:p text:style-name="P3">Selected Experience<text:toc-mark text:string-value="Project Experience " text:outline-level="3"/></text:p>
      <text:p text:style-name="P5"/>
      <text:p text:style-name="P8"><text:tab/><text:span text:style-name="T4">Sam's Club </text:span>App (201<text:span text:style-name="T4">7</text:span>-<text:span text:style-name="T6">2020</text:span>)<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6">Working with <text:span text:style-name="T4">Sam's Club </text:span>team on iOS <text:span text:style-name="T6">eCommerce app</text:span>. <text:span text:style-name="T6">Converting it to a reactive </text:span>architecture using RxSwift <text:span text:style-name="T4">, preparing to move to new SwiftUI/Combine frameworks, replacing legacy modules with new work, and writing new custom modules.</text:span></text:p>
      <text:p text:style-name="P8"><text:tab/>ASDA Universal App (2014-<text:span text:style-name="T4">2017</text:span>)<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6">Working with Walmart Labs team on iOS app for their UK subsidiary, ASDA. Converting the internal architecture of the app to be reactive using RxSwift, rewriting legacy components in Swift and RxSwift, and writing new modules using RxSwift.</text:p>
      <text:p text:style-name="P10"/>
      <text:p text:style-name="P7"><text:tab/>Home Power Generator Control and Status App (2016-<text:span text:style-name="T5">2016</text:span>)</text:p>
      <text:p text:style-name="P15">Developing consumer app to control client's gas-powered generators via Bluetooth.</text:p>
      <text:p text:style-name="P9"/>
      <text:p text:style-name="P7"><text:tab/>Custom Universal App for Physical Therapists (2016-<text:span text:style-name="T5">2019</text:span>)</text:p>
      <text:p text:style-name="P15">Developing new medical app for therapists to develop individual treatment and exercises plans for physical rehabilitation patients. <text:s/>Synchronizing data between client, backend API, and a distributed database architecture based on Realm.</text:p>
      <text:p text:style-name="P9"/>
      <text:p text:style-name="P8"><text:tab/></text:p>
      <text:p text:style-name="P13"><text:tab/>Client App Maintenance (2010-present)</text:p>
      <text:p text:style-name="P15">On-going work with various clients to maintain and update existing apps.</text:p>
      <text:p text:style-name="P9"/>
      <text:p text:style-name="P7"><text:tab/>High-End Real Estate Development Sales Tool (201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5">Developed interactive sales tool for a client's very large construction project.</text:p>
      <text:p text:style-name="P9"/>
      <text:p text:style-name="P7"><text:tab/>Mission Control Training (2013-201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5">Developed iOS app and backend for a client's employee training business. It manages videos, assessments, and tracking and is built on Microsoft’s Azure cloud services.</text:p>
      <text:p text:style-name="P5"/>
      <text:p text:style-name="P7"><text:tab/>MyFactor – Personal medical incident and injury tracking app (2013)<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5">Developed app for a client so their customers can track medically significant events which they can share with medical provider to receive advice and therapy alternatives.</text:p>
      <text:p text:style-name="P5"/>
      <text:p text:style-name="P7"><text:tab/>MedSnap ID – Medical app for prescription and drug identification (2012-2013)<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5">Developed data synchronization for a suite of medical apps. Helped client design backend API for synchronization, assisted with data security and system architecture.</text:p>
      <text:p text:style-name="P9"/>
      <text:p text:style-name="P8"><text:tab/><text:span text:style-name="T4">A variety of other custom iOS apps developed for clients </text:span>(<text:span text:style-name="T4">iOS</text:span>, <text:span text:style-name="T4">2010-2013</text:span>)<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8"><text:tab/>Designed and developed manufacturing tracking system (Java, 2006-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2"><text:span text:style-name="T2"><text:tab/></text:span><text:span text:style-name="T3">DoD and DARPA projects researcher and developer (2003-2007) </text:span><text:toc-mark text:string-value="System Analysis for a multi-tier, DII-COE system (2001) " text:outline-level="4"/></text:p>
      <text:p text:style-name="P11"><text:span text:style-name="T2"><text:tab/></text:span><text:span text:style-name="T3">Adjunct Instructor for various university computer courses (1982-2006) </text:span></text:p>
      <text:p text:style-name="P19">Development Experience <text:toc-mark text:string-value="Design experience " text:outline-level="3"/></text:p>
      <text:p text:style-name="P23">iPhone, iPad, and iOS development<text:tab/><text:tab/><text:tab/><text:tab/><text:span text:style-name="T4">10</text:span>+ years</text:p>
      <text:p text:style-name="P23"><text:span text:style-name="T6">Reactive architecture design and</text:span> development<text:tab/><text:tab/><text:tab/><text:span text:style-name="T6">5</text:span>+ years</text:p>
      <text:p text:style-name="P23">Other mobile systems design and development<text:tab/><text:tab/><text:tab/>8+ years</text:p>
      <text:p text:style-name="P23">Java Desktop and Enterprise design and development<text:tab/><text:tab/>15+ years</text:p>
      <text:p text:style-name="P20">Multi-tier, distributed systems design and development<text:tab/><text:tab/>30+ years</text:p>
      <text:p text:style-name="P20">Overall professional development experience<text:tab/><text:tab/><text:tab/><text:span text:style-name="T4">40</text:span> years</text:p>
      <text:p text:style-name="P21"/>
      <text:p text:style-name="P4">Speaking and Teaching Experience <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toc-mark text:string-value="Work Experience " text:outline-level="3"/></text:p>
      <text:p text:style-name="P20">Various conference sessions 2011-2014 (CocoaConf, 360iDev, D2Cincinnati)</text:p>
      <text:p text:style-name="P20">Regular presenter at CocoaHeads (Columbus, Cincinnati, Cleveland, Indianapolis)</text:p>
      <text:p text:style-name="P20">Co-organizer of Cincinnati CocoaDev</text:p>
      <text:p text:style-name="P20">Adjunct instructor, programming courses (Cedarville 1982-2006)</text:p>
      <text:p text:style-name="P21"/>
      <text:p text:style-name="P4">Work Experience <text:toc-mark text:string-value="Work Experience " text:outline-level="3"/><text:toc-mark text:string-value="Work Experience " text:outline-level="3"/></text:p>
      <text:p text:style-name="P22">Independent<text:tab/><text:tab/>1998-present<text:tab/>Independent software craftsman</text:p>
      <text:p text:style-name="P14">Synergy, Inc.<text:tab/><text:tab/>1996‑1998<text:tab/>Software design and development</text:p>
      <text:p text:style-name="P14">Rotman &amp; Sjoquist<text:tab/>1988-1996<text:tab/>Extensive consulting and programming in a partnership</text:p>
      <text:p text:style-name="P14">Cedarville College<text:tab/>1982‑1996<text:tab/>Various roles ending with Asst. Dir. of Computer Services</text:p>
      <text:p text:style-name="P14"><text:tab/><text:tab/><text:tab/><text:tab/><text:tab/>Adjunct Instructor, computer language courses</text:p>
      <text:p text:style-name="P14">Independent<text:tab/><text:tab/>1980-1988<text:tab/>Custom software development for various businesses.</text:p>
      <text:p text:style-name="P2"/>
      <text:p text:style-name="P4">Education <text:toc-mark text:string-value="Education " text:outline-level="3"/></text:p>
      <text:p text:style-name="P17">B.A. Business Administration, Cedarville College, June 1982</text:p>
      <text:p text:style-name="P17">Computer Information Systems 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5in" fo:text-align="justify" style:justify-single-word="false" fo:orphans="0" fo:widows="0" style:text-autospace="none" style:vertical-align="baseli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_31_Bullets" style:display-name="1Bullets" style:family="paragraph">
      <style:paragraph-properties fo:margin-left="0.5in" fo:margin-right="0in" style:line-height-at-least="0.25in" fo:text-align="justify" style:justify-single-word="false" fo:orphans="0" fo:widows="0" fo:text-indent="-0.5in" style:auto-text-indent="false" style:text-autospace="none" style:vertical-align="baseline">
        <style:tab-stops>
          <style:tab-stop style:position="0in"/>
        </style:tab-stops>
      </style:paragraph-properties>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2_Bullets" style:display-name="2Bullets" style:family="paragraph">
      <style:paragraph-properties fo:margin-left="1in" fo:margin-right="0in" style:line-height-at-least="0.25in" fo:text-align="justify" style:justify-single-word="false" fo:orphans="0" fo:widows="0" fo:text-indent="-0.5in" style:auto-text-indent="false" style:text-autospace="none" style:vertical-align="baseline">
        <style:tab-stops>
          <style:tab-stop style:position="-0.5in"/>
          <style:tab-stop style:position="0in"/>
        </style:tab-stops>
      </style:paragraph-properties>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3_Bullets" style:display-name="3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4_Bullets" style:display-name="4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5_Bullets" style:display-name="5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6_Bullets" style:display-name="6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7_Bullets" style:display-name="7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8_Bullets" style:display-name="8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1_Definitions" style:display-name="1Definitions" style:family="paragraph">
      <style:paragraph-properties style:line-height-at-least="0.25in" fo:text-align="justify" style:justify-single-word="false" fo:orphans="0" fo:widows="0"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2_Definitions" style:display-name="2Definitions" style:family="paragraph">
      <style:paragraph-properties fo:margin-left="0.6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3_Definitions" style:display-name="3Definitions" style:family="paragraph">
      <style:paragraph-properties fo:margin-left="1.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4_Definitions" style:display-name="4Definitions" style:family="paragraph">
      <style:paragraph-properties fo:margin-left="1.5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5_Definitions" style:display-name="5Definitions" style:family="paragraph">
      <style:paragraph-properties fo:margin-left="2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6_Definitions" style:display-name="6Definitions" style:family="paragraph">
      <style:paragraph-properties fo:margin-left="2.4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7_Definitions" style:display-name="7Definitions" style:family="paragraph">
      <style:paragraph-properties fo:margin-left="2.9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8_Definitions" style:display-name="8Definitions" style:family="paragraph">
      <style:paragraph-properties fo:margin-left="3.3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style:tab-stops>
          <style:tab-stop style:position="6.5in" style:type="right"/>
        </style:tab-stops>
      </style:paragraph-properties>
    </style:style>
    <style:style style:name="MP2" style:family="paragraph" style:parent-style-name="Standard">
      <style:paragraph-properties fo:text-align="end" style:justify-single-word="false"/>
      <style:text-properties fo:font-size="12pt" officeooo:rsid="00159688" officeooo:paragraph-rsid="00159688" style:font-size-asian="12pt" style:font-size-complex="12pt"/>
    </style:style>
    <style:style style:name="MP3" style:family="paragraph" style:parent-style-name="Footer">
      <style:paragraph-properties fo:text-align="center" style:justify-single-word="false"/>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2pt" style:font-size-asian="12pt" style:font-size-complex="12pt"/>
    </style:style>
    <style:style style:name="MT3" style:family="text">
      <style:text-properties officeooo:rsid="0017197b"/>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Douglas W. Sjoquist<text:tab/></text:span><text:a xlink:type="simple" xlink:href="mailto:dwSjoquist@sunetos.com" text:style-name="Internet_20_link" text:visited-style-name="Visited_20_Internet_20_Link"><text:span text:style-name="Internet_20_link"><text:span text:style-name="MT2">dwsjoquist@sunetos.com</text:span></text:span></text:a><text:span text:style-name="MT1"><text:tab/></text:span><text:span text:style-name="MT2">www.sunetos.com</text:span></text:p>
        <text:p text:style-name="MP2"><text:span text:style-name="MT3">June</text:span> 2020</text:p>
      </style:header>
      <style:footer>
        <text:p text:style-name="MP3">Page <text:page-number text:select-page="current">1</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NeoOffice/3.2017.22$MacOSX_X86_64 NeoOffice_project/0</meta:generator>
    <dc:title>Douglas W</dc:title>
    <meta:initial-creator>Douglas W Sjoquist</meta:initial-creator>
    <meta:creation-date>2006-05-12T21:25:00</meta:creation-date>
    <dc:date>2020-05-29T13:53:40.067328830</dc:date>
    <dc:language>en-US</dc:language>
    <meta:editing-cycles>85</meta:editing-cycles>
    <meta:editing-duration>PT11H22M28S</meta:editing-duration>
    <meta:print-date>2011-11-03T17:08:36</meta:print-date>
    <meta:document-statistic meta:table-count="0" meta:image-count="0" meta:object-count="0" meta:page-count="3" meta:paragraph-count="52" meta:word-count="543" meta:character-count="4026" meta:non-whitespace-character-count="3491"/>
    <meta:user-defined meta:name="Info 1"/>
    <meta:user-defined meta:name="Info 2"/>
    <meta:user-defined meta:name="Info 3"/>
    <meta:user-defined meta:name="Info 4"/>
  </office:meta>
</office:document-meta>
</file>