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2pt" style:font-size-asian="12pt" style:font-size-complex="12pt"/>
    </style:style>
    <style:style style:name="P2" style:family="paragraph" style:parent-style-name="Standard">
      <style:paragraph-properties fo:line-height="100%"/>
      <style:text-properties fo:font-size="12pt" style:font-size-asian="12pt" style:font-size-complex="12pt"/>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paragraph-properties fo:line-height="100%"/>
      <style:text-properties fo:font-size="12pt" fo:font-weight="bold" style:font-size-asian="12pt" style:font-weight-asian="bold" style:font-size-complex="12pt" style:font-weight-complex="bold"/>
    </style:style>
    <style:style style:name="P5" style:family="paragraph" style:parent-style-name="Standard">
      <style:paragraph-properties fo:line-height="0.1in"/>
      <style:text-properties fo:font-size="12pt" fo:font-weight="bold" style:font-size-asian="12pt" style:font-weight-asian="bold" style:font-size-complex="12pt" style:font-weight-complex="bold"/>
    </style:style>
    <style:style style:name="P6" style:family="paragraph" style:parent-style-name="Footer">
      <style:paragraph-properties fo:text-align="center" style:justify-single-word="false"/>
    </style:style>
    <style:style style:name="P7"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8"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style>
    <style:style style:name="P9" style:family="paragraph" style:parent-style-name="Standard">
      <style:paragraph-properties fo:margin-left="2.5in" fo:margin-right="0in" fo:line-height="100%" fo:text-indent="-2.5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0" style:family="paragraph" style:parent-style-name="_32_Definitions">
      <style:paragraph-properties fo:text-align="start" style:justify-single-word="false"/>
    </style:style>
    <style:style style:name="P11" style:family="paragraph" style:parent-style-name="_32_Definitions">
      <style:paragraph-properties fo:line-height="100%" fo:text-align="start" style:justify-single-word="false"/>
    </style:style>
    <style:style style:name="P12" style:family="paragraph" style:parent-style-name="_32_Definitions">
      <style:paragraph-properties fo:text-align="start" style:justify-single-word="false"/>
      <style:text-properties fo:color="#000000" style:font-name="TimesNewRomanPSMT" fo:font-size="12pt" style:font-name-asian="TimesNewRomanPSMT" style:font-size-asian="12pt" style:font-name-complex="TimesNewRomanPSMT" style:font-size-complex="12pt"/>
    </style:style>
    <style:style style:name="P13" style:family="paragraph" style:parent-style-name="_32_Definitions">
      <style:paragraph-properties fo:text-align="start" style:justify-single-word="false"/>
      <style:text-properties fo:font-size="12pt" fo:font-weight="bold" style:font-size-asian="12pt" style:font-weight-asian="bold" style:font-size-complex="12pt" style:font-weight-complex="bold"/>
    </style:style>
    <style:style style:name="P14"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style>
    <style:style style:name="P15"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fo:font-size="12pt" style:font-size-asian="12pt" style:font-size-complex="12pt"/>
    </style:style>
    <style:style style:name="P16" style:family="paragraph" style:parent-style-name="Standard">
      <style:paragraph-properties fo:line-height="100%" fo:break-before="page"/>
      <style:text-properties fo:font-size="12pt" fo:font-weight="bold" style:font-size-asian="12pt" style:font-weight-asian="bold" style:font-size-complex="12pt" style:font-weight-complex="bold"/>
    </style:style>
    <style:style style:name="P17" style:family="paragraph" style:parent-style-name="Standard">
      <style:paragraph-properties fo:margin-left="0in" fo:margin-right="0in" fo:line-height="100%"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8" style:family="paragraph" style:parent-style-name="Standard">
      <style:paragraph-properties fo:margin-left="0in" fo:margin-right="0in" fo:line-height="0.1in" fo:text-align="start" style:justify-single-word="false" fo:text-indent="0in" style:auto-text-indent="false"/>
      <style:text-properties fo:font-size="12pt" fo:font-weight="bold" style:font-size-asian="12pt" style:font-weight-asian="bold" style:font-size-complex="12pt" style:font-weight-complex="bold"/>
    </style:style>
    <style:style style:name="P19" style:family="paragraph" style:parent-style-name="Standard" style:master-page-name="Standard">
      <style:paragraph-properties style:page-number="auto">
        <style:tab-stops>
          <style:tab-stop style:position="6.5in" style:type="right"/>
        </style:tab-stops>
      </style:paragraph-properties>
    </style:style>
    <style:style style:name="P20" style:family="paragraph" style:parent-style-name="Standard" style:master-page-name="Standard">
      <style:paragraph-properties style:page-number="auto"/>
      <style:text-properties fo:font-size="12pt" fo:font-weight="bold" style:font-size-asian="12pt" style:font-weight-asian="bold" style:font-size-complex="12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Summary <text:toc-mark text:string-value="Summary " text:outline-level="3"/></text:p>
      <text:p text:style-name="P5"/>
      <text:p text:style-name="P10">Experienced software craftsman with a strong background in iOS and distributed system design and development.</text:p>
      <text:p text:style-name="P5"/>
      <text:p text:style-name="P10">Rapid problem analysis with the ability to work with clients and end users in developing and refining requirements. Good grasp of how each piece fits in with client's overall goals and needs. <text:s/>Experienced and comfortable with agile development methods. <text:s/>Ability to learn and integrate new techniques, tools, and skills quickly.<text:span text:style-name="T3"> </text:span>Able to mentor and assist development team members in developing their skills.</text:p>
      <text:p text:style-name="P13"/>
      <text:p text:style-name="P3">Project and Speaking Experience<text:toc-mark text:string-value="Project Experience " text:outline-level="3"/></text:p>
      <text:p text:style-name="P5"/>
      <text:p text:style-name="P7"><text:tab/>Network monitoring iPad app (in development)<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ing iPad version of client's existing iPhone app which combines a new UI with large, existing codebase. Refactoring and reorganizing the existing codebase to better share common services between both versions.</text:p>
      <text:p text:style-name="P5"/>
      <text:p text:style-name="P7"><text:tab/>MindSwarms video survey iPhone app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ing an iPhone app for a client that records short video snippets using augmented reality style controls, authenticates against client's backend, and synchronizes its local Core Data store with data and responses on the server.</text:p>
      <text:p text:style-name="P5"/>
      <text:p text:style-name="P7"><text:tab/>Spoke at 360iDev 2011: OCMock: Crash Test Dummies For Your Code<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Gave a half-day seminar on mock objects in iOS development at 360iDev.</text:p>
      <text:p text:style-name="P5"/>
      <text:p text:style-name="P7"><text:tab/>AOPA Aviation Summit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universal iPad/iPhone app with news and Twitter feeds for the annual summit of the Aircraft Owner's and Pilot Association; schedules; exhibitors; Google maps integration; guides; ability to mark items as favorites; search capability.</text:p>
      <text:p text:style-name="P5"/>
      <text:p text:style-name="P7"><text:tab/>Spoke at CocoaConf 2011: Test Driven Development in the iOS World<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Gave sessions on using TDD techniques in iOS development at CocoaConf.</text:p>
      <text:p text:style-name="P5"/>
      <text:p text:style-name="P7"/>
      <text:p text:style-name="P7"><text:soft-page-break/><text:tab/>EAA AirVenture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universal iPad/iPhone app for the Experimental Aircraft Association's annual fly-in convention with multiple RSS and Twitter feeds; schedules; exhibitor information; maps; guides; ability to mark items as favorites; search capability.</text:p>
      <text:p text:style-name="P5"/>
      <text:p text:style-name="P7"><text:tab/>Form builder component for iPad medical records app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framework to dynamically generate data entry forms based on templates downloaded from a server, allow user to enter data and submit it back to the server.</text:p>
      <text:p text:style-name="P5"/>
      <text:p text:style-name="P7"><text:tab/>Sun 'n Fun Fly-In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universal iPad/iPhone app with event schedules; exhibitor information; convention maps and other information for the Sun 'n Fun's annual convention.</text:p>
      <text:p text:style-name="P5"/>
      <text:p text:style-name="P7"><text:tab/>iOS framework to embed quizzes into training apps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framework to build a bank of questions, videos, and images that can be integrated into an app, allowing the user to test their understanding of the material.</text:p>
      <text:p text:style-name="P5"/>
      <text:p text:style-name="P7"><text:tab/>Certification review app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2">Modified an existing training app to use the test bank framework that helps users review. <text:s/>The client uses it as a model to integrate the quiz framework into other apps.</text:p>
      <text:p text:style-name="P5"/>
      <text:p text:style-name="P7"><text:tab/>iOS framework to integrate LineaPro SDK with UIWebView (2010)<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framework to integrate LineaPRO barcode and magnetic card reader with UIWebView. <text:s/>The client uses it to access the device without writing Objective-C code.</text:p>
      <text:p text:style-name="P5"/>
      <text:p text:style-name="P7"><text:tab/>Recycling and manufacturing tracking system (2006-present)<text:toc-mark text:string-value="System Analysis for a multi-tier, DII-COE system (2001) " text:outline-level="4"/><text:toc-mark text:string-value="System Analysis for a multi-tier, DII-COE system (2001) " text:outline-level="4"/><text:span text:style-name="T3"/><text:toc-mark text:string-value="System Analysis for a multi-tier, DII-COE system (2001) " text:outline-level="4"/><text:toc-mark text:string-value="System Analysis for a multi-tier, DII-COE system (2001) " text:outline-level="4"/></text:p>
      <text:p text:style-name="P10">Primary architect and lead developer for a multi-tier, distributed Java-based system to support a major recycling line of business for a manufacturing client.</text:p>
      <text:p text:style-name="P5"/>
      <text:p text:style-name="P8"><text:span text:style-name="T2"><text:tab/></text:span><text:span text:style-name="T3">DoD and DARPA projects researcher and developer (2003-2007) </text:span><text:toc-mark text:string-value="System Analysis for a multi-tier, DII-COE system (2001) " text:outline-level="4"/><text:span text:style-name="T3"/></text:p>
      <text:p text:style-name="P10">Humanitarian aid planning system using semantic web concepts. Intelligent agent systems. User configurable, real time displays for Navy small boats.</text:p>
      <text:p text:style-name="P18"/>
      <text:p text:style-name="P8"><text:span text:style-name="T2"><text:tab/></text:span><text:span text:style-name="T3">Adjunct Instructor for various university computer courses (1982-2006) </text:span></text:p>
      <text:p text:style-name="P16">Development experience <text:toc-mark text:string-value="Design experience " text:outline-level="3"/></text:p>
      <text:p text:style-name="P14">iPhone, iPad, and iOS development<text:tab/><text:tab/><text:tab/><text:tab/>3 years</text:p>
      <text:p text:style-name="P14">Other mobile systems design and development<text:tab/><text:tab/><text:tab/>4 years</text:p>
      <text:p text:style-name="P14">Java Desktop and Enterprise design and development<text:tab/><text:tab/>10+ years</text:p>
      <text:p text:style-name="P14">Multitier, distributed systems design and development<text:tab/><text:tab/>20+ years</text:p>
      <text:p text:style-name="P14">Overall professional development experience<text:tab/><text:tab/><text:tab/>30+ years</text:p>
      <text:p text:style-name="P15"/>
      <text:p text:style-name="P4">Selected Language and Tool experience <text:toc-mark text:string-value="Languages and Tools experience " text:outline-level="3"/><text:toc-mark text:string-value="Languages and Tools experience " text:outline-level="3"/></text:p>
      <text:p text:style-name="P14">Mobile: iOS, Android, J2ME, WinCE</text:p>
      <text:p text:style-name="P14">Languages: Objective-C, Java, C/C++, Delphi</text:p>
      <text:p text:style-name="P2"/>
      <text:p text:style-name="P4">Work Experience <text:toc-mark text:string-value="Work Experience " text:outline-level="3"/></text:p>
      <text:p text:style-name="P17">Independent<text:tab/><text:tab/>1998-present<text:tab/>Independent software craftsman</text:p>
      <text:p text:style-name="P9">Synergy, Inc.<text:tab/><text:tab/>1996‑1998<text:tab/>Software design and development</text:p>
      <text:p text:style-name="P9">Rotman &amp; Sjoquist<text:tab/>1988-1996<text:tab/>Extensive consulting and programming in a partnership</text:p>
      <text:p text:style-name="P9">Cedarville College<text:tab/>1982‑1996<text:tab/>Various roles ending with Asst. Dir. of Computer Services</text:p>
      <text:p text:style-name="P9"><text:tab/><text:tab/><text:tab/><text:tab/><text:tab/>Adjunct Instructor, computer language courses</text:p>
      <text:p text:style-name="P9">Independent<text:tab/><text:tab/>1980-1988<text:tab/>Custom software development for various businesses.</text:p>
      <text:p text:style-name="P2"/>
      <text:p text:style-name="P4">Education <text:toc-mark text:string-value="Education " text:outline-level="3"/></text:p>
      <text:p text:style-name="P11">B.A. Business Administration, Cedarville College, June 1982</text:p>
      <text:p text:style-name="P11">Computer Information Systems 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5in" fo:text-align="justify" style:justify-single-word="false" fo:orphans="0" fo:widows="0" style:text-autospace="none" style:vertical-align="baseli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_31_Bullets" style:display-name="1Bullets" style:family="paragraph">
      <style:paragraph-properties fo:margin-left="0.5in" fo:margin-right="0in" style:line-height-at-least="0.25in" fo:text-align="justify" style:justify-single-word="false" fo:orphans="0" fo:widows="0" fo:text-indent="-0.5in" style:auto-text-indent="false" style:text-autospace="none" style:vertical-align="baseline">
        <style:tab-stops>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Bullets" style:display-name="2Bullets" style:family="paragraph">
      <style:paragraph-properties fo:margin-left="1in" fo:margin-right="0in" style:line-height-at-least="0.25in" fo:text-align="justify" style:justify-single-word="false" fo:orphans="0" fo:widows="0" fo:text-indent="-0.5in" style:auto-text-indent="false" style:text-autospace="none" style:vertical-align="baseline">
        <style:tab-stops>
          <style:tab-stop style:position="-0.5in"/>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Bullets" style:display-name="3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Bullets" style:display-name="4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Bullets" style:display-name="5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Bullets" style:display-name="6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Bullets" style:display-name="7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Bullets" style:display-name="8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1_Definitions" style:display-name="1Definitions" style:family="paragraph">
      <style:paragraph-properties style:line-height-at-least="0.25in" fo:text-align="justify" style:justify-single-word="false" fo:orphans="0" fo:widows="0"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Definitions" style:display-name="2Definitions" style:family="paragraph">
      <style:paragraph-properties fo:margin-left="0.6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Definitions" style:display-name="3Definitions" style:family="paragraph">
      <style:paragraph-properties fo:margin-left="1.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Definitions" style:display-name="4Definitions" style:family="paragraph">
      <style:paragraph-properties fo:margin-left="1.5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Definitions" style:display-name="5Definitions" style:family="paragraph">
      <style:paragraph-properties fo:margin-left="2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Definitions" style:display-name="6Definitions" style:family="paragraph">
      <style:paragraph-properties fo:margin-left="2.4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Definitions" style:display-name="7Definitions" style:family="paragraph">
      <style:paragraph-properties fo:margin-left="2.9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Definitions" style:display-name="8Definitions" style:family="paragraph">
      <style:paragraph-properties fo:margin-left="3.3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style:tab-stops>
          <style:tab-stop style:position="6.5in" style:type="right"/>
        </style:tab-stops>
      </style:paragraph-properties>
    </style:style>
    <style:style style:name="MP2" style:family="paragraph" style:parent-style-name="Standard">
      <style:paragraph-properties fo:text-align="end" style:justify-single-word="false"/>
      <style:text-properties fo:font-size="12pt" style:font-size-asian="12pt" style:font-size-complex="12pt"/>
    </style:style>
    <style:style style:name="MP3" style:family="paragraph" style:parent-style-name="Footer">
      <style:paragraph-properties fo:text-align="center" style:justify-single-word="false"/>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2pt" style:font-size-asian="12pt" style:font-size-complex="12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Douglas W. Sjoquist<text:tab/></text:span><text:a xlink:type="simple" xlink:href="mailto:dwSjoquist@sunetos.com"><text:span text:style-name="Internet_20_link"><text:span text:style-name="MT2">dwsjoquist@sunetos.com</text:span></text:span></text:a><text:span text:style-name="MT1"><text:tab/></text:span><text:span text:style-name="MT2">www.sunetos.com</text:span></text:p>
        <text:p text:style-name="MP2">December 2011</text:p>
      </style:header>
      <style:footer>
        <text:p text:style-name="MP3">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2$Unix OpenOffice.org_project/Patch 0</meta:generator>
    <dc:title>Douglas W</dc:title>
    <meta:initial-creator>Douglas W Sjoquist</meta:initial-creator>
    <meta:creation-date>2006-05-12T21:25:00</meta:creation-date>
    <dc:date>2011-12-02T13:03:33</dc:date>
    <dc:language>en-US</dc:language>
    <meta:editing-cycles>52</meta:editing-cycles>
    <meta:editing-duration>PT06H09M39S</meta:editing-duration>
    <meta:print-date>2011-11-03T17:08:36</meta:print-date>
    <meta:document-statistic meta:table-count="0" meta:image-count="0" meta:object-count="0" meta:page-count="3" meta:paragraph-count="53" meta:word-count="700" meta:character-count="4543"/>
    <meta:user-defined meta:name="Info 1"/>
    <meta:user-defined meta:name="Info 2"/>
    <meta:user-defined meta:name="Info 3"/>
    <meta:user-defined meta:name="Info 4"/>
  </office:meta>
</office:document-meta>
</file>