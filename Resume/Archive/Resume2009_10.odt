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</style:style>
    <style:style style:name="P7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break-before="page">
        <style:tab-stops>
          <style:tab-stop style:position="6.5in" style:type="right"/>
        </style:tab-stops>
      </style:paragraph-properties>
    </style:style>
    <style:style style:name="P9" style:family="paragraph" style:parent-style-name="Standard">
      <style:paragraph-properties fo:margin-left="2.5in" fo:margin-right="0in" fo:line-height="100%" fo:text-indent="-2.5in" style:auto-text-indent="false">
        <style:tab-stops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_32_Definitions">
      <style:paragraph-properties fo:text-align="start" style:justify-single-word="false"/>
    </style:style>
    <style:style style:name="P11" style:family="paragraph" style:parent-style-name="_32_Definitions">
      <style:paragraph-properties fo:line-height="100%" fo:text-align="start" style:justify-single-word="false"/>
    </style:style>
    <style:style style:name="P12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</style:style>
    <style:style style:name="P13" style:family="paragraph" style:parent-style-name="Standard" style:master-page-name="Standard">
      <style:paragraph-properties style:page-number="auto">
        <style:tab-stops>
          <style:tab-stop style:position="6.5in" style:type="right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6.5in" style:type="right"/>
        </style:tab-stops>
      </style:paragraph-properties>
    </style:style>
    <style:style style:name="P1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2.5in" fo:margin-right="0in" fo:line-height="100%" fo:text-indent="-2.5in" style:auto-text-indent="false">
        <style:tab-stops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Douglas W. Sjoquist<text:tab/></text:span><text:a xlink:type="simple" xlink:href="mailto:dwSjoquist@sunetos.com"><text:span text:style-name="Internet_20_link"><text:span text:style-name="T2">dwSjoquist@sunetos.com</text:span></text:span></text:a></text:p>
      <text:p text:style-name="P14"><text:span text:style-name="T1">Sunetos, Inc.<text:tab/></text:span><text:span text:style-name="T2">www.sunetos.com</text:span></text:p>
      <text:p text:style-name="P2">October 2009</text:p>
      <text:p text:style-name="P4"/>
      <text:p text:style-name="P4">Summary <text:toc-mark text:string-value="Summary " text:outline-level="3"/></text:p>
      <text:p text:style-name="P10">Experienced system architect with excellent communication, analysis, design and development skills. Strong background with multi-tier, distributed system design and development on servers, application clients, and web clients. <text:s/>Extensive experience with tools and frameworks such as client and server side Java, Delphi, Google Web Toolkit, and JBoss. </text:p>
      <text:p text:style-name="P10"/>
      <text:p text:style-name="P10">Rapid problem analysis with the ability to work with users in developing and refining requirements. Good grasp of how each piece fits in with organization's overall goals and needs. <text:s/>Experienced and comfortable with agile development methods. <text:s/>Ability to learn and integrate new development techniques, tools, and skills quickly, soon becoming productive in the new environment.</text:p>
      <text:p text:style-name="P1"/>
      <text:p text:style-name="P4">Project Experience<text:toc-mark text:string-value="Project Experience " text:outline-level="3"/></text:p>
      <text:p text:style-name="P6"><text:span text:style-name="T3"><text:tab/></text:span><text:span text:style-name="T3">Recycling and manufacturing tracking system (2006-2009)</text:span><text:toc-mark text:string-value="System Analysis for a multi-tier, DII-COE system (2001) " text:outline-level="4"/><text:toc-mark text:string-value="System Analysis for a multi-tier, DII-COE system (2001) " text:outline-level="4"/><text:span text:style-name="T3"/><text:toc-mark text:string-value="System Analysis for a multi-tier, DII-COE system (2001) " text:outline-level="4"/><text:toc-mark text:string-value="System Analysis for a multi-tier, DII-COE system (2001) " text:outline-level="4"/><text:span text:style-name="T3"/></text:p>
      <text:p text:style-name="P10">Primary architect and lead developer for a system to support the recycling business for a mining client. <text:s text:c="2"/>The system is written in Java using a mixture of open source and proprietary components, with a mixed database environment of IBM DB2 and Apache Derby.</text:p>
      <text:p text:style-name="P6"><text:span text:style-name="T2"><text:tab/></text:span><text:span text:style-name="T3">Update existing Java Swing application <text:s/>(2009) </text:span><text:toc-mark text:string-value="System Analysis for a multi-tier, DII-COE system (2001) " text:outline-level="4"/><text:span text:style-name="T3"/></text:p>
      <text:p text:style-name="P10">Modifying an existing Java Swing application to support undo and redo. <text:s/>The existing application is a visual designer tool for US Air Force end users to build screens for their data warehouse. <text:s/>The modifications will allow them complete undo and redo functionality for their work.</text:p>
      <text:p text:style-name="P6"><text:span text:style-name="T2"><text:tab/></text:span><text:span text:style-name="T3">Java library development (2003-2006) </text:span><text:toc-mark text:string-value="System Analysis for a multi-tier, DII-COE system (2001) " text:outline-level="4"/><text:span text:style-name="T3"/></text:p>
      <text:p text:style-name="P10">Developed various custom libraries to meet client specifications such as a role-based security library for swing components that controls various component properties (visible, enabled, editable) dynamically based on a user's authenticated credentials.</text:p>
      <text:p text:style-name="P6"><text:span text:style-name="T2"><text:tab/></text:span><text:span text:style-name="T3">Prototype DoD Humanitarian Aid and Disaster Relief planning system (2006-2007) </text:span><text:toc-mark text:string-value="System Analysis for a multi-tier, DII-COE system (2001) " text:outline-level="4"/><text:span text:style-name="T3"/></text:p>
      <text:p text:style-name="P10">Worked as researcher and developer on a prototype Humanitarian Aid and Disaster Relief planning system for the DoD. <text:s/>Developed module that allowed web users to collaboratively build, approve, and publish initial planning documents and briefings. <text:s/><text:soft-page-break/>Researched use of semantic web concepts (ontologies, OWL, Protege') in support of the process.</text:p>
      <text:p text:style-name="P6"><text:span text:style-name="T2"><text:tab/></text:span><text:span text:style-name="T3">Job posting and application web applications (2005-2006) </text:span><text:toc-mark text:string-value="System Analysis for a multi-tier, DII-COE system (2001) " text:outline-level="4"/><text:span text:style-name="T3"/><text:toc-mark text:string-value="System Analysis for a multi-tier, DII-COE system (2001) " text:outline-level="4"/><text:span text:style-name="T3"/></text:p>
      <text:p text:style-name="P10">Developed job posting and job application web applications to allow HR department to quickly build new listings from existing postings or templates. <text:s/>It allows current employees to apply over the corporate intranet, and others to apply over a secure internet application.</text:p>
      <text:p text:style-name="P7"><text:tab/>Software agent research prototype (2004-2005) <text:toc-mark text:string-value="System Analysis for a multi-tier, DII-COE system (2001) " text:outline-level="4"/></text:p>
      <text:p text:style-name="P10">Designed and developed java subsystems for a proof of concept distributed agent system: rule engine subsystem, end-user rule builder GUI, tracking subsystem, other subsystem APIs, and system utilities. <text:s/>Mentored team members in J2EE design, Java patterns, and refactoring. <text:s/>Worked with client representatives in developing roadmap for overall project.</text:p>
      <text:p text:style-name="P6"><text:span text:style-name="T2"><text:tab/></text:span><text:span text:style-name="T3">Java Servlet/Applet timecard (2003) </text:span><text:toc-mark text:string-value="System Analysis for a multi-tier, DII-COE system (2001) " text:outline-level="4"/><text:span text:style-name="T3"/></text:p>
      <text:p text:style-name="P10">Developed time card applet interface to an existing small business accounting system including employee entry and signing of hours and supervisor approval and printing.</text:p>
      <text:p text:style-name="P6"><text:span text:style-name="T2"><text:tab/></text:span><text:span text:style-name="T3">Configurable real time engine data display (2003)</text:span></text:p>
      <text:p text:style-name="P10">Developed prototype system to provide a user configurable display system for an integrated bridge system for Navy small boats. <text:s/>The system monitors and displays real time data feeds from multiple engines in text or graphics mode.</text:p>
      <text:p text:style-name="P6"><text:span text:style-name="T2"><text:tab/></text:span><text:span text:style-name="T3">Java and J2EE mentoring and training (2002-2006)</text:span></text:p>
      <text:p text:style-name="P8"><text:span text:style-name="T1">Douglas W. Sjoquist<text:tab/></text:span><text:a xlink:type="simple" xlink:href="mailto:dwSjoquist@sunetos.com"><text:span text:style-name="Internet_20_link"><text:span text:style-name="T2">dwSjoquist@sunetos.com</text:span></text:span></text:a></text:p>
      <text:p text:style-name="P14"><text:span text:style-name="T1">Sunetos, Inc.<text:tab/></text:span><text:span text:style-name="T2">www.sunetos.com</text:span></text:p>
      <text:p text:style-name="P2">October 2009</text:p>
      <text:p text:style-name="P1"/>
      <text:p text:style-name="P5">Design experience <text:toc-mark text:string-value="Design experience " text:outline-level="3"/></text:p>
      <text:p text:style-name="P12">JEE, Java Enterprise Edition design and development<text:tab/><text:tab/>10 years</text:p>
      <text:p text:style-name="P12">Web Services design and development<text:tab/><text:tab/><text:tab/><text:tab/>4 years</text:p>
      <text:p text:style-name="P12">Multi-tier, distributed systems design and development<text:tab/><text:tab/>14 years</text:p>
      <text:p text:style-name="P12">Software and database analysis, design, and development<text:tab/><text:tab/>29 years</text:p>
      <text:p text:style-name="P12">Handheld systems design and development<text:tab/><text:tab/><text:tab/>2 years</text:p>
      <text:p text:style-name="P12">Peer to peer (P2P) design and development<text:tab/><text:tab/><text:tab/>6 years</text:p>
      <text:p text:style-name="P12">CORBA, Common Object Request Broker Architecture<text:tab/><text:tab/>2 years</text:p>
      <text:p text:style-name="P12">Object oriented design and development<text:tab/><text:tab/><text:tab/><text:tab/>20 years</text:p>
      <text:p text:style-name="P3"/>
      <text:p text:style-name="P5">Languages and Tools experience <text:toc-mark text:string-value="Languages and Tools experience " text:outline-level="3"/></text:p>
      <text:p text:style-name="P12">Java<text:tab/><text:tab/><text:tab/><text:tab/><text:tab/><text:tab/><text:tab/><text:tab/><text:tab/>12 years</text:p>
      <text:p text:style-name="P12">JEE (IBM WebSphere, BEA WebLogic, Tomcat, JBoss)<text:tab/><text:tab/>7 years</text:p>
      <text:p text:style-name="P12">TIBCO (BusinessWorks/Rendezvous)<text:tab/><text:tab/><text:tab/><text:tab/>1+ years</text:p>
      <text:p text:style-name="P12">Mobile platforms (Palm OS/J2ME/PocketPC/WinCE)<text:tab/><text:tab/>2 years</text:p>
      <text:p text:style-name="P12">SQL (Oracle, Microsoft, DB2)<text:tab/><text:tab/><text:tab/><text:tab/><text:tab/>13 years</text:p>
      <text:p text:style-name="P12">Others (Delphi, CORBA, Pick/UniData, C/C++, FORTRAN, COBOL)</text:p>
      <text:p text:style-name="P3"/>
      <text:p text:style-name="P5">Work Experience <text:toc-mark text:string-value="Work Experience " text:outline-level="3"/></text:p>
      <text:p text:style-name="P9">Sunetos, Inc.<text:tab/><text:tab/>1998-present<text:tab/>Multi-tier, distributed system architect and developer</text:p>
      <text:p text:style-name="P9">ICF International<text:tab/>2006-present<text:tab/>Software development VPT</text:p>
      <text:p text:style-name="P9">Synergy, Inc.<text:tab/><text:tab/>1996‑1998<text:tab/>Software design and development</text:p>
      <text:p text:style-name="P9">Rotman &amp; Sjoquist<text:tab/>1988-1996<text:tab/>Extensive consulting and programming in a partnership</text:p>
      <text:p text:style-name="P9">Cedarville College<text:tab/>1982‑1996<text:tab/>Various roles ending with Asst. Dir. of Computer Services</text:p>
      <text:p text:style-name="P9">Cedarville College<text:tab/>1985‑1994<text:tab/>Adjunct Instructor, computer language courses</text:p>
      <text:p text:style-name="P9">Custom development<text:tab/>1980-1988<text:tab/>Custom software development for various businesses.</text:p>
      <text:p text:style-name="P3"/>
      <text:p text:style-name="P5">Education <text:toc-mark text:string-value="Education " text:outline-level="3"/></text:p>
      <text:p text:style-name="P11">B.A. Business Administration, Cedarville College, June 1982, GPA 3.5/4.0</text:p>
      <text:p text:style-name="P11">Computer Information Systems empha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25in" fo:text-align="justify" style:justify-single-word="false" fo:orphans="0" fo:widows="0" style:text-autospace="non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_31_Bullets" style:display-name="1Bullets" style:family="paragraph">
      <style:paragraph-properties fo:margin-left="0.5in" fo:margin-right="0in" style:line-height-at-least="0.25in" fo:text-align="justify" style:justify-single-word="false" fo:orphans="0" fo:widows="0" fo:text-indent="-0.5in" style:auto-text-indent="false" style:text-autospace="none" style:vertical-align="baseline">
        <style:tab-stops>
          <style:tab-stop style:position="0in"/>
        </style:tab-stops>
      </style:paragraph-properties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2_Bullets" style:display-name="2Bullets" style:family="paragraph">
      <style:paragraph-properties fo:margin-left="1in" fo:margin-right="0in" style:line-height-at-least="0.25in" fo:text-align="justify" style:justify-single-word="false" fo:orphans="0" fo:widows="0" fo:text-indent="-0.5in" style:auto-text-indent="false" style:text-autospace="none" style:vertical-align="baseline">
        <style:tab-stops>
          <style:tab-stop style:position="-0.5in"/>
          <style:tab-stop style:position="0in"/>
        </style:tab-stops>
      </style:paragraph-properties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3_Bullets" style:display-name="3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4_Bullets" style:display-name="4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5_Bullets" style:display-name="5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6_Bullets" style:display-name="6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7_Bullets" style:display-name="7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8_Bullets" style:display-name="8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1_Definitions" style:display-name="1Definitions" style:family="paragraph">
      <style:paragraph-properties style:line-height-at-least="0.25in" fo:text-align="justify" style:justify-single-word="false" fo:orphans="0" fo:widows="0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2_Definitions" style:display-name="2Definitions" style:family="paragraph">
      <style:paragraph-properties fo:margin-left="0.6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3_Definitions" style:display-name="3Definitions" style:family="paragraph">
      <style:paragraph-properties fo:margin-left="1.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4_Definitions" style:display-name="4Definitions" style:family="paragraph">
      <style:paragraph-properties fo:margin-left="1.5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5_Definitions" style:display-name="5Definitions" style:family="paragraph">
      <style:paragraph-properties fo:margin-left="2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6_Definitions" style:display-name="6Definitions" style:family="paragraph">
      <style:paragraph-properties fo:margin-left="2.4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7_Definitions" style:display-name="7Definitions" style:family="paragraph">
      <style:paragraph-properties fo:margin-left="2.9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8_Definitions" style:display-name="8Definitions" style:family="paragraph">
      <style:paragraph-properties fo:margin-left="3.3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7</meta:generator>
    <dc:title>Douglas W</dc:title>
    <meta:initial-creator>Douglas W Sjoquist</meta:initial-creator>
    <meta:creation-date>2006-05-12T21:25:00</meta:creation-date>
    <dc:date>2009-10-25T21:08:00</dc:date>
    <dc:language>en-US</dc:language>
    <meta:editing-cycles>11</meta:editing-cycles>
    <meta:editing-duration>PT01H13M49S</meta:editing-duration>
    <meta:document-statistic meta:table-count="0" meta:image-count="0" meta:object-count="0" meta:page-count="3" meta:paragraph-count="54" meta:word-count="694" meta:character-count="4967"/>
    <meta:user-defined meta:name="Info 1"/>
    <meta:user-defined meta:name="Info 2"/>
    <meta:user-defined meta:name="Info 3"/>
    <meta:user-defined meta:name="Info 4"/>
  </office:meta>
</office:document-meta>
</file>