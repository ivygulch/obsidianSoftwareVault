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.2083in" fo:text-align="end" style:justify-single-word="false" style:writing-mode="lr-tb"/>
      <style:text-properties fo:font-size="12pt" officeooo:rsid="00159688" officeooo:paragraph-rsid="00159688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" style:family="paragraph" style:parent-style-name="Standard">
      <style:paragraph-properties fo:margin-left="2.5in" fo:margin-right="0in" fo:line-height="100%" fo:text-indent="-2.5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line-height="0.0835in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00%" fo:break-before="pag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0.1in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1.5in" fo:margin-right="0in" fo:line-height="0.1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733c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48e9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e16ff" style:font-size-asian="12pt" style:font-weight-asian="bold" style:font-size-complex="12pt" style:font-weight-complex="bold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_32_Definitions">
      <style:paragraph-properties fo:line-height="0.0835in" fo:text-align="start" style:justify-single-word="false" style:writing-mode="lr-tb"/>
      <style:text-properties officeooo:paragraph-rsid="001b8145"/>
    </style:style>
    <style:style style:name="P17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</style:style>
    <style:style style:name="P18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officeooo:paragraph-rsid="00148e97"/>
    </style:style>
    <style:style style:name="P19" style:family="paragraph" style:parent-style-name="_32_Definitions">
      <style:paragraph-properties fo:text-align="start" style:justify-single-word="false"/>
      <style:text-properties officeooo:paragraph-rsid="001733cb"/>
    </style:style>
    <style:style style:name="P20" style:family="paragraph" style:parent-style-name="_32_Definitions">
      <style:paragraph-properties fo:text-align="start" style:justify-single-word="false"/>
      <style:text-properties officeooo:paragraph-rsid="00148e97"/>
    </style:style>
    <style:style style:name="P21" style:family="paragraph" style:parent-style-name="_32_Definitions">
      <style:paragraph-properties fo:text-align="start" style:justify-single-word="false"/>
      <style:text-properties officeooo:paragraph-rsid="001b8145"/>
    </style:style>
    <style:style style:name="P22" style:family="paragraph" style:parent-style-name="_32_Definitions">
      <style:paragraph-properties fo:line-height="100%" fo:text-align="start" style:justify-single-word="false"/>
    </style:style>
    <style:style style:name="P23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</style:style>
    <style:style style:name="P24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  <style:text-properties officeooo:paragraph-rsid="0017197b"/>
    </style:style>
    <style:style style:name="P25" style:family="paragraph" style:parent-style-name="_32_Definitions">
      <style:paragraph-properties fo:text-align="start" style:justify-single-word="false"/>
      <style:text-properties officeooo:rsid="001b8145" officeooo:paragraph-rsid="001e16ff"/>
    </style:style>
    <style:style style:name="P26" style:family="paragraph" style:parent-style-name="_32_Definitions">
      <style:paragraph-properties fo:text-align="start" style:justify-single-word="false"/>
      <style:text-properties officeooo:rsid="001e16ff" officeooo:paragraph-rsid="001e16ff"/>
    </style:style>
    <style:style style:name="P27" style:family="paragraph" style:parent-style-name="_32_Definitions">
      <style:paragraph-properties fo:text-align="start" style:justify-single-word="false"/>
      <style:text-properties officeooo:rsid="001b8145" officeooo:paragraph-rsid="001e16ff"/>
    </style:style>
    <style:style style:name="P28" style:family="paragraph" style:parent-style-name="Standard" style:master-page-name="Standard">
      <style:paragraph-properties style:line-height-at-least="0.2083in" style:page-number="auto" style:writing-mode="lr-tb">
        <style:tab-stops>
          <style:tab-stop style:position="6.5in" style:type="right"/>
        </style:tab-stops>
      </style:paragraph-properties>
    </style:style>
    <style:style style:name="P29" style:family="paragraph" style:parent-style-name="Standard" style:master-page-name="Standard">
      <style:paragraph-properties style:page-number="auto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e16ff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officeooo:rsid="001e16ff"/>
    </style:style>
    <style:style style:name="T5" style:family="text">
      <style:text-properties officeooo:rsid="001b8145"/>
    </style:style>
    <style:style style:name="T6" style:family="text">
      <style:text-properties officeooo:rsid="001733cb"/>
    </style:style>
    <style:style style:name="T7" style:family="text">
      <style:text-properties officeooo:rsid="0017a673"/>
    </style:style>
    <style:style style:name="T8" style:family="text">
      <style:text-properties officeooo:rsid="0017197b"/>
    </style:style>
    <style:style style:name="T9" style:family="text">
      <style:text-properties officeooo:rsid="00148e97"/>
    </style:style>
    <style:style style:name="T10" style:family="text">
      <style:text-properties officeooo:rsid="001985dd"/>
    </style:style>
    <style:style style:name="T11" style:family="text">
      <style:text-properties officeooo:rsid="001bccaf"/>
    </style:style>
    <style:style style:name="T12" style:family="text">
      <style:text-properties officeooo:rsid="001f2503"/>
    </style:style>
    <style:style style:name="T13" style:family="text">
      <style:text-properties officeooo:rsid="00208b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Summary <text:toc-mark text:string-value="Summary " text:outline-level="3"/></text:p>
      <text:p text:style-name="P6"/>
      <text:p text:style-name="P21">Experienced software craftsman with a <text:span text:style-name="T7">wide variety of experience across industries, markets, and tools. Specializing </text:span>in iOS and <text:span text:style-name="T8">reactive </text:span>system design and development.</text:p>
      <text:p text:style-name="P16"/>
      <text:p text:style-name="P21">Rapid problem analysis with the ability to work with clients and end users in developing and refining requirements. Good grasp of how piece<text:span text:style-name="T11">s </text:span>client's goals and help them balance technical excellence with business objectives. Experienced with agile development methods. Ability to learn and integrate new techniques, tools, and skills quickly.<text:span text:style-name="T3"> </text:span>Able to mentor and assist team members in developing their skills.</text:p>
      <text:p text:style-name="P16"/>
      <text:p text:style-name="P7">Selected Experience<text:toc-mark text:string-value="Project Experience " text:outline-level="3"/></text:p>
      <text:p text:style-name="P10"/>
      <text:p text:style-name="P14"><text:tab/><text:span text:style-name="T4">Principal Software Engineer at Walmart </text:span>(<text:span text:style-name="T6">2021-present)</text:span></text:p>
      <text:p text:style-name="P26">Working on Walmart transaction team, leading iOS checkout development. Responsible for code quality, mentoring, analytics, coordination with other teams.</text:p>
      <text:p text:style-name="P14"><text:tab/><text:span text:style-name="T4">McGraw Hill Education Sharpen App </text:span>(<text:span text:style-name="T6">2022-</text:span><text:span text:style-name="T13">2023</text:span><text:span text:style-name="T6">)</text:span></text:p>
      <text:p text:style-name="P25">Work<text:span text:style-name="T12">ed</text:span> with <text:span text:style-name="T4">McGraw Hill team on iOS Sharpen App development and as a data engineer with overall analytics pipeline from mobile apps and website.</text:span></text:p>
      <text:p text:style-name="P14"><text:tab/><text:span text:style-name="T6">Walmart App </text:span>(<text:span text:style-name="T6">2020-2021)</text:span></text:p>
      <text:p text:style-name="P25">Work<text:span text:style-name="T4">ed </text:span>with Walmart <text:span text:style-name="T4">Global Tech</text:span>, tech lead for checkout team on new iOS eCommerce app built on a uni-directional, plug-in style architecture using Combine.</text:p>
      <text:p text:style-name="P14"><text:tab/><text:span text:style-name="T9">Sam's Club </text:span>App (201<text:span text:style-name="T9">7</text:span>-<text:span text:style-name="T8">2020</text:span>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19">Work<text:span text:style-name="T10">ed</text:span> with <text:span text:style-name="T9">Sam's Club </text:span>team on iOS <text:span text:style-name="T8">eCommerce app</text:span>. <text:span text:style-name="T8">Converted app to use </text:span>RxSwift<text:span text:style-name="T9">, prepared it to move to Combine frameworks.</text:span></text:p>
      <text:p text:style-name="P12"><text:tab/>ASDA Universal App (2014-<text:span text:style-name="T9">2017</text:span>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20">Work<text:span text:style-name="T5">ed</text:span> with Walmart Labs team on iOS app for their UK subsidiary, ASDA. Convert<text:span text:style-name="T10">ed </text:span>app to <text:span text:style-name="T10">use </text:span>RxSwift: rewr<text:span text:style-name="T10">ote</text:span> legacy components and <text:span text:style-name="T10">wrote </text:span>new modules.</text:p>
      <text:p text:style-name="P11"/>
      <text:p text:style-name="P13"><text:tab/><text:span text:style-name="T10">Custom iOS apps development and maintenance for clients </text:span>(<text:span text:style-name="T9">iOS</text:span>, <text:span text:style-name="T9">2010-2019</text:span>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13"><text:tab/>Designed and developed manufacturing tracking system (Java, 2006-2012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18"><text:span text:style-name="T2"><text:tab/></text:span><text:span text:style-name="T3">DoD and DARPA projects researcher and developer (2003-2007) </text:span><text:toc-mark text:string-value="System Analysis for a multi-tier, DII-COE system (2001) " text:outline-level="4"/></text:p>
      <text:p text:style-name="P17"><text:span text:style-name="T2"><text:tab/></text:span><text:span text:style-name="T3">Adjunct Instructor for various university computer courses (1982-2006) </text:span></text:p>
      <text:p text:style-name="P9">Development Experience <text:toc-mark text:string-value="Design experience " text:outline-level="3"/></text:p>
      <text:p text:style-name="P24">iPhone, iPad, and iOS development<text:tab/><text:tab/><text:tab/><text:tab/><text:span text:style-name="T9">1</text:span><text:span text:style-name="T12">3</text:span>+ years</text:p>
      <text:p text:style-name="P24"><text:span text:style-name="T8">Reactive architecture design and</text:span> development<text:tab/><text:tab/><text:tab/><text:span text:style-name="T4">8</text:span>+ years</text:p>
      <text:p text:style-name="P24">Other mobile systems design and development<text:tab/><text:tab/><text:tab/><text:span text:style-name="T4">10</text:span>+ years</text:p>
      <text:p text:style-name="P24">Java Desktop and Enterprise design and development<text:tab/><text:tab/>15+ years</text:p>
      <text:p text:style-name="P23">Multi-tier, distributed systems design and development<text:tab/><text:tab/>30+ years</text:p>
      <text:p text:style-name="P23">Overall professional development experience<text:tab/><text:tab/><text:tab/><text:span text:style-name="T9">40+</text:span> years</text:p>
      <text:p text:style-name="P5"/>
      <text:p text:style-name="P8">Speaking and Teaching Experience 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/text:p>
      <text:p text:style-name="P23">Various conference sessions 2011-2014 (CocoaConf, 360iDev, D2Cincinnati)</text:p>
      <text:p text:style-name="P23">Regular presenter at CocoaHeads (Columbus, Cincinnati, Cleveland, Indianapolis)</text:p>
      <text:p text:style-name="P23">Co-organizer of Cincinnati CocoaDev</text:p>
      <text:p text:style-name="P23">Adjunct instructor, programming courses (Cedarville 1982-2006)</text:p>
      <text:p text:style-name="P5"/>
      <text:p text:style-name="P8">Work Experience <text:toc-mark text:string-value="Work Experience " text:outline-level="3"/><text:toc-mark text:string-value="Work Experience " text:outline-level="3"/></text:p>
      <text:p text:style-name="P4">Independent<text:tab/><text:tab/>1998-present<text:tab/>Independent software craftsman</text:p>
      <text:p text:style-name="P3">Synergy, Inc.<text:tab/><text:tab/>1996‑1998<text:tab/>Software design and development</text:p>
      <text:p text:style-name="P3">Rotman &amp; Sjoquist<text:tab/>1988-1996<text:tab/>Extensive consulting and programming in a partnership</text:p>
      <text:p text:style-name="P3">Cedarville College<text:tab/>1982‑1996<text:tab/>Various roles ending with Asst. Dir. of Computer Services</text:p>
      <text:p text:style-name="P3"><text:tab/><text:tab/><text:tab/><text:tab/><text:tab/>Adjunct Instructor, computer language courses</text:p>
      <text:p text:style-name="P3">Independent<text:tab/><text:tab/>1980-1988<text:tab/>Custom software development for various businesses.</text:p>
      <text:p text:style-name="P2"/>
      <text:p text:style-name="P8">Education <text:toc-mark text:string-value="Education " text:outline-level="3"/></text:p>
      <text:p text:style-name="P22">B.A. Business Administration, Cedarville College, June 1982</text:p>
      <text:p text:style-name="P22">Computer Information Systems emphasi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25in" fo:text-align="justify" style:justify-single-word="false" fo:orphans="0" fo:widows="0" style:text-autospace="non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_31_Bullets" style:display-name="1Bullets" style:family="paragraph">
      <style:paragraph-properties fo:margin-left="0.5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0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2_Bullets" style:display-name="2Bullets" style:family="paragraph">
      <style:paragraph-properties fo:margin-left="1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-0.5in"/>
          <style:tab-stop style:position="0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3_Bullets" style:display-name="3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4_Bullets" style:display-name="4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5_Bullets" style:display-name="5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6_Bullets" style:display-name="6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7_Bullets" style:display-name="7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8_Bullets" style:display-name="8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1_Definitions" style:display-name="1Definitions" style:family="paragraph">
      <style:paragraph-properties style:line-height-at-least="0.25in" fo:text-align="justify" style:justify-single-word="false" fo:orphans="0" fo:widows="0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2_Definitions" style:display-name="2Definitions" style:family="paragraph">
      <style:paragraph-properties fo:margin-left="0.6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3_Definitions" style:display-name="3Definitions" style:family="paragraph">
      <style:paragraph-properties fo:margin-left="1.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4_Definitions" style:display-name="4Definitions" style:family="paragraph">
      <style:paragraph-properties fo:margin-left="1.5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5_Definitions" style:display-name="5Definitions" style:family="paragraph">
      <style:paragraph-properties fo:margin-left="2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6_Definitions" style:display-name="6Definitions" style:family="paragraph">
      <style:paragraph-properties fo:margin-left="2.4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7_Definitions" style:display-name="7Definitions" style:family="paragraph">
      <style:paragraph-properties fo:margin-left="2.9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8_Definitions" style:display-name="8Definitions" style:family="paragraph">
      <style:paragraph-properties fo:margin-left="3.3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style:line-height-at-least="0.2083in" style:page-number="auto" style:writing-mode="lr-tb">
        <style:tab-stops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style:line-height-at-least="0.2083in" fo:text-align="end" style:justify-single-word="false" style:writing-mode="lr-tb"/>
      <style:text-properties fo:font-size="12pt" officeooo:rsid="00159688" officeooo:paragraph-rsid="00159688" style:font-size-asian="12pt" style:font-size-complex="12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officeooo:rsid="001f2503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uglas W. Sjoquist<text:tab/></text:span><text:a xlink:type="simple" xlink:href="mailto:dwSjoquist@sunetos.com" text:style-name="Internet_20_link" text:visited-style-name="Visited_20_Internet_20_Link"><text:span text:style-name="Internet_20_link"><text:span text:style-name="MT2">dwsjoquist@sunetos.com</text:span></text:span></text:a></text:p>
        <text:p text:style-name="MP2"><text:span text:style-name="MT3">March</text:span> 202<text:span text:style-name="MT3">4</text:span></text:p>
      </style:header>
      <style:footer>
        <text:p text:style-name="MP3">Page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MacOSX_AARCH64 LibreOffice_project/cdeefe45c17511d326101eed8008ac4092f278a9</meta:generator>
    <dc:title>Douglas W</dc:title>
    <meta:initial-creator>Douglas W Sjoquist</meta:initial-creator>
    <meta:creation-date>2006-05-12T21:25:00</meta:creation-date>
    <dc:date>2024-03-13T09:10:42.648852577</dc:date>
    <dc:language>en-US</dc:language>
    <meta:editing-cycles>95</meta:editing-cycles>
    <meta:editing-duration>PT13H59M3S</meta:editing-duration>
    <meta:print-date>2011-11-03T17:08:36</meta:print-date>
    <meta:document-statistic meta:table-count="0" meta:image-count="0" meta:object-count="0" meta:page-count="2" meta:paragraph-count="43" meta:word-count="405" meta:character-count="3015" meta:non-whitespace-character-count="2618"/>
    <meta:user-defined meta:name="Info 1"/>
    <meta:user-defined meta:name="Info 2"/>
    <meta:user-defined meta:name="Info 3"/>
    <meta:user-defined meta:name="Info 4"/>
  </office:meta>
</office:document-meta>
</file>