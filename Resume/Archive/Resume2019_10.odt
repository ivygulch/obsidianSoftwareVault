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line-height="100%"/>
      <style:text-properties fo:font-size="12pt" fo:font-weight="bold" style:font-size-asian="12pt" style:font-weight-asian="bold" style:font-size-complex="12pt" style:font-weight-complex="bold"/>
    </style:style>
    <style:style style:name="P4" style:family="paragraph" style:parent-style-name="Standard">
      <style:paragraph-properties fo:line-height="0.1in"/>
      <style:text-properties fo:font-size="12pt" fo:font-weight="bold" style:font-size-asian="12pt" style:font-weight-asian="bold" style:font-size-complex="12pt" style:font-weight-complex="bold"/>
    </style:style>
    <style:style style:name="P5" style:family="paragraph" style:parent-style-name="Footer">
      <style:paragraph-properties fo:text-align="center" style:justify-single-word="false"/>
    </style:style>
    <style:style style:name="P6"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master-page-name="Standard">
      <style:paragraph-properties style:page-number="auto">
        <style:tab-stops>
          <style:tab-stop style:position="6.5in" style:type="right"/>
        </style:tab-stops>
      </style:paragraph-properties>
    </style:style>
    <style:style style:name="P18"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19" style:family="paragraph" style:parent-style-name="Standard">
      <style:paragraph-properties fo:text-align="end" style:justify-single-word="false"/>
      <style:text-properties fo:font-size="12pt" officeooo:rsid="00148e97" officeooo:paragraph-rsid="00148e97" style:font-size-asian="12pt" style:font-size-complex="12pt"/>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24"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25"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26" style:family="paragraph" style:parent-style-name="_32_Definitions">
      <style:paragraph-properties fo:text-align="start" style:justify-single-word="false"/>
    </style:style>
    <style:style style:name="P27" style:family="paragraph" style:parent-style-name="_32_Definitions">
      <style:paragraph-properties fo:text-align="start" style:justify-single-word="false"/>
      <style:text-properties officeooo:paragraph-rsid="00148e97"/>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48e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mmary <text:toc-mark text:string-value="Summary " text:outline-level="3"/></text:p>
      <text:p text:style-name="P4"/>
      <text:p text:style-name="P10">Experienced software craftsman with a strong background in iOS and distributed, asynchronous system design and development.</text:p>
      <text:p text:style-name="P4"/>
      <text:p text:style-name="P10">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12"/>
      <text:p text:style-name="P2">Selected Experience<text:toc-mark text:string-value="Project Experience " text:outline-level="3"/></text:p>
      <text:p text:style-name="P4"/>
      <text:p text:style-name="P23"><text:tab/><text:span text:style-name="T4">Sam's Club </text:span>App (201<text:span text:style-name="T4">7</text:span>-<text:span text:style-name="T4">present</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27">Working with <text:span text:style-name="T4">Sam's Club </text:span>team on iOS . Converting <text:span text:style-name="T4">to a reactive </text:span>architecture using RxSwift <text:span text:style-name="T4">for now, preparing to move to new SwiftUI/Combine frameworks, replacing legacy modules with new work, and writing new custom modules.</text:span></text:p>
      <text:p text:style-name="P23"><text:tab/>ASDA Universal App (2014-<text:span text:style-name="T4">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27">Working with Walmart Labs team on iOS app for their UK subsidiary, ASDA. Converting the internal architecture of the app to be reactive using RxSwift, rewriting legacy components in Swift and RxSwift, and writing new modules using RxSwift.</text:p>
      <text:p text:style-name="P24"/>
      <text:p text:style-name="P6"><text:tab/>Home Power Generator Control and Status App (2016-present)</text:p>
      <text:p text:style-name="P10">Developing consumer app to control client's gas-powered generators via Bluetooth.</text:p>
      <text:p text:style-name="P7"/>
      <text:p text:style-name="P6"><text:tab/>Custom Universal App for Physical Therapists (2016-present)</text:p>
      <text:p text:style-name="P10">Developing new medical app for therapists to develop individual treatment and exercises plans for physical rehabilitation patients. <text:s/>Synchronizing data between client, backend API, and a distributed database architecture based on Realm.</text:p>
      <text:p text:style-name="P7"/>
      <text:p text:style-name="P23"><text:tab/></text:p>
      <text:p text:style-name="P25"><text:tab/>Client App Maintenance (2010-present)</text:p>
      <text:p text:style-name="P10">On-going work with various clients to maintain and update existing apps.</text:p>
      <text:p text:style-name="P7"/>
      <text:p text:style-name="P6"><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teractive sales tool for a client's very large construction project.</text:p>
      <text:p text:style-name="P7"/>
      <text:p text:style-name="P6"><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OS app and backend for a client's employee training business. It manages videos, assessments, and tracking and is built on Microsoft’s Azure cloud services.</text:p>
      <text:p text:style-name="P4"/>
      <text:p text:style-name="P6"><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pp for a client so their customers can track medically significant events which they can share with medical provider to receive advice and therapy alternatives.</text:p>
      <text:p text:style-name="P4"/>
      <text:p text:style-name="P6"><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for a suite of medical apps. Helped client design backend API for synchronization, assisted with data security and system architecture.</text:p>
      <text:p text:style-name="P7"/>
      <text:p text:style-name="P23"><text:tab/><text:span text:style-name="T4">A variety of other custom iOS apps developed for clients </text:span>(<text:span text:style-name="T4">iOS</text:span>, <text:span text:style-name="T4">2010-2013</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23"><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21"><text:span text:style-name="T2"><text:tab/></text:span><text:span text:style-name="T3">DoD and DARPA projects researcher and developer (2003-2007) </text:span><text:toc-mark text:string-value="System Analysis for a multi-tier, DII-COE system (2001) " text:outline-level="4"/></text:p>
      <text:p text:style-name="P8"><text:span text:style-name="T2"><text:tab/></text:span><text:span text:style-name="T3">Adjunct Instructor for various university computer courses (1982-2006) </text:span></text:p>
      <text:p text:style-name="P13">Development Experience <text:toc-mark text:string-value="Design experience " text:outline-level="3"/></text:p>
      <text:p text:style-name="P14">iPhone, iPad, and iOS development<text:tab/><text:tab/><text:tab/><text:tab/><text:span text:style-name="T4">10</text:span>+ years</text:p>
      <text:p text:style-name="P14">Other mobile systems design and development<text:tab/><text:tab/><text:tab/>8+ years</text:p>
      <text:p text:style-name="P14">Java Desktop and Enterprise design and development<text:tab/><text:tab/>15+ years</text:p>
      <text:p text:style-name="P14">Multi-tier, distributed systems design and development<text:tab/><text:tab/>30+ years</text:p>
      <text:p text:style-name="P14">Overall professional development experience<text:tab/><text:tab/><text:tab/><text:span text:style-name="T4">40</text:span> years</text:p>
      <text:p text:style-name="P15"/>
      <text:p text:style-name="P3">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4">Various conference sessions 2011-2014 (CocoaConf, 360iDev, D2Cincinnati)</text:p>
      <text:p text:style-name="P14">Regular presenter at CocoaHeads (Columbus, Cincinnati, Cleveland, Indianapolis)</text:p>
      <text:p text:style-name="P14">Co-organizer of Cincinnati CocoaDev</text:p>
      <text:p text:style-name="P14">Adjunct instructor, programming courses (Cedarville 1982-2006)</text:p>
      <text:p text:style-name="P15"/>
      <text:p text:style-name="P3">Work Experience <text:toc-mark text:string-value="Work Experience " text:outline-level="3"/><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1"/>
      <text:p text:style-name="P3">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officeooo:rsid="00148e97" officeooo:paragraph-rsid="00148e97"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span text:style-name="MT1"><text:tab/></text:span><text:span text:style-name="MT2">www.sunetos.com</text:span></text:p>
        <text:p text:style-name="MP2">October 2019</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17.20$MacOSX_X86_64 NeoOffice_project/0</meta:generator>
    <dc:title>Douglas W</dc:title>
    <meta:initial-creator>Douglas W Sjoquist</meta:initial-creator>
    <meta:creation-date>2006-05-12T21:25:00</meta:creation-date>
    <dc:date>2019-10-15T08:21:50.201741162</dc:date>
    <dc:language>en-US</dc:language>
    <meta:editing-cycles>83</meta:editing-cycles>
    <meta:editing-duration>PT11H16M17S</meta:editing-duration>
    <meta:print-date>2011-11-03T17:08:36</meta:print-date>
    <meta:document-statistic meta:table-count="0" meta:image-count="0" meta:object-count="0" meta:page-count="3" meta:paragraph-count="51" meta:word-count="535" meta:character-count="3978" meta:non-whitespace-character-count="3452"/>
    <meta:user-defined meta:name="Info 1"/>
    <meta:user-defined meta:name="Info 2"/>
    <meta:user-defined meta:name="Info 3"/>
    <meta:user-defined meta:name="Info 4"/>
  </office:meta>
</office:document-meta>
</file>