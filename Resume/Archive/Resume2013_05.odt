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paragraph-properties fo:margin-left="0in" fo:margin-right="0in" fo:line-height="0.1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2"/>
      <text:p text:style-name="P3">Selected Project and Speaking Experience<text:toc-mark text:string-value="Project Experience " text:outline-level="3"/></text:p>
      <text:p text:style-name="P5"/>
      <text:p text:style-name="P7"><text:tab/>MyFactor – Personal medical incident and injury tracking app (2012-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app for a pharmaceutical client for their customers to document and track medically significant events related to their medical condition. It allows customers to interact with the client's medical staff to receive advice and therapy alternatives.</text:p>
      <text:p text:style-name="P5"/>
      <text:p text:style-name="P7"><text:tab/>MedSnap ID – Medical app for prescription and drug identification (2012-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data synchronization and database component for a suite of apps in the medical field. Helped client design backend API for synchronization, assisted with data security and system architecture.</text:p>
      <text:p text:style-name="P5"/>
      <text:p text:style-name="P7"><text:tab/>Spoke at CocoaConf (DC and Dallas 2013, Columbus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various sessions for developers: building drag and drop style applications; automated testing techniques; and tools to manage iOS project dependencies.</text:p>
      <text:p text:style-name="P5"/>
      <text:p text:style-name="P7"><text:tab/>SUN 'n FUN Conference app (2013)</text:p>
      <text:p text:style-name="P7"><text:tab/>WAI Women in Aviation Conference app (2013)</text:p>
      <text:p text:style-name="P10">Rewrote conference app framework to be configurable without requiring coding changes, changed the style of the app to use slide out menus and custom submodules to handle different content types.</text:p>
      <text:p text:style-name="P5"/>
      <text:p text:style-name="P7"/>
      <text:p text:style-name="P7"><text:soft-page-break/><text:tab/>EAA AirVenture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7"><text:tab/>SUN 'n FUN Conference app (2012)</text:p>
      <text:p text:style-name="P7"><text:tab/>WAI Women in Aviatio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amily of universal apps for several aviation conferences. <text:s/>App features include customizable personal schedule, an integrated PDF reader, multiple schedules, exhibitors, maps, and information pages, and automatic network based updates of data.</text:p>
      <text:p text:style-name="P5"/>
      <text:p text:style-name="P7"><text:tab/>iLA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nitial version of client's iPad app for organizing notes, links, and ideas and then sharing them automatically with peers.</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Recycling and manufacturing tracking system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Architect and lead developer for a multi-tier system (Java) for a manufacturing client.</text:p>
      <text:p text:style-name="P5"/>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10">Various planning <text:s/>and intelligent agent systems. </text:p>
      <text:p text:style-name="P17"/>
      <text:p text:style-name="P8"><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3">iPhone, iPad, and iOS development<text:tab/><text:tab/><text:tab/><text:tab/>4+ years</text:p>
      <text:p text:style-name="P13">Other mobile systems design and development<text:tab/><text:tab/><text:tab/>5+ years</text:p>
      <text:p text:style-name="P13">Java Desktop and Enterprise design and development<text:tab/><text:tab/>15+ years</text:p>
      <text:p text:style-name="P13">Multi-tier, distributed systems design and development<text:tab/><text:tab/>25+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text:p>
      <text:p text:style-name="P13">Languages: Objective-C, Java, C/C++</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May 2013</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dc:title>Douglas W</dc:title>
    <meta:initial-creator>Douglas W Sjoquist</meta:initial-creator>
    <meta:creation-date>2006-05-12T21:25:00</meta:creation-date>
    <dc:date>2013-05-06T11:45:41</dc:date>
    <dc:language>en-US</dc:language>
    <meta:editing-cycles>68</meta:editing-cycles>
    <meta:editing-duration>PT08H25M29S</meta:editing-duration>
    <meta:print-date>2011-11-03T17:08:36</meta:print-date>
    <meta:document-statistic meta:table-count="0" meta:image-count="0" meta:object-count="0" meta:page-count="3" meta:paragraph-count="52" meta:word-count="676" meta:character-count="4190"/>
    <meta:user-defined meta:name="Info 1"/>
    <meta:user-defined meta:name="Info 2"/>
    <meta:user-defined meta:name="Info 3"/>
    <meta:user-defined meta:name="Info 4"/>
  </office:meta>
</office:document-meta>
</file>