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33cb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a67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_32_Definitions">
      <style:paragraph-properties fo:text-align="start" style:justify-single-word="false"/>
      <style:text-properties officeooo:paragraph-rsid="001733cb"/>
    </style:style>
    <style:style style:name="P8" style:family="paragraph" style:parent-style-name="_32_Definitions">
      <style:paragraph-properties fo:text-align="start" style:justify-single-word="false"/>
      <style:text-properties officeooo:paragraph-rsid="00148e97"/>
    </style:style>
    <style:style style:name="P9" style:family="paragraph" style:parent-style-name="_32_Definitions">
      <style:paragraph-properties fo:line-height="100%" fo:text-align="start" style:justify-single-word="false"/>
    </style:style>
    <style:style style:name="P10" style:family="paragraph" style:parent-style-name="_32_Definition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break-before="pag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13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paragraph-rsid="0017197b"/>
    </style:style>
    <style:style style:name="P14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0.1in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b814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33c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48e9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b814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24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officeooo:paragraph-rsid="00148e97"/>
    </style:style>
    <style:style style:name="P25" style:family="paragraph" style:parent-style-name="Standard">
      <style:paragraph-properties fo:line-height="0.0835in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P27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P29" style:family="paragraph" style:parent-style-name="_32_Definitions">
      <style:paragraph-properties fo:text-align="start" style:justify-single-word="false"/>
      <style:text-properties officeooo:rsid="001b8145" officeooo:paragraph-rsid="001b8145"/>
    </style:style>
    <style:style style:name="P30" style:family="paragraph" style:parent-style-name="_32_Definitions">
      <style:paragraph-properties fo:text-align="start" style:justify-single-word="false"/>
      <style:text-properties officeooo:paragraph-rsid="0017a673"/>
    </style:style>
    <style:style style:name="P31" style:family="paragraph" style:parent-style-name="_32_Definitions">
      <style:paragraph-properties fo:text-align="start" style:justify-single-word="false"/>
      <style:text-properties officeooo:paragraph-rsid="001b8145"/>
    </style:style>
    <style:style style:name="P32" style:family="paragraph" style:parent-style-name="_32_Definitions">
      <style:paragraph-properties fo:line-height="0.0835in" fo:text-align="start" style:justify-single-word="false" style:writing-mode="lr-tb"/>
      <style:text-properties officeooo:paragraph-rsid="001b814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7a673"/>
    </style:style>
    <style:style style:name="T5" style:family="text">
      <style:text-properties officeooo:rsid="001733cb"/>
    </style:style>
    <style:style style:name="T6" style:family="text">
      <style:text-properties officeooo:rsid="0017197b"/>
    </style:style>
    <style:style style:name="T7" style:family="text">
      <style:text-properties officeooo:rsid="00148e97"/>
    </style:style>
    <style:style style:name="T8" style:family="text">
      <style:text-properties officeooo:rsid="00159688"/>
    </style:style>
    <style:style style:name="T9" style:family="text">
      <style:text-properties officeooo:rsid="001985dd"/>
    </style:style>
    <style:style style:name="T10" style:family="text">
      <style:text-properties officeooo:rsid="001b8145"/>
    </style:style>
    <style:style style:name="T11" style:family="text">
      <style:text-properties officeooo:rsid="001bc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ummary <text:toc-mark text:string-value="Summary " text:outline-level="3"/></text:p>
      <text:p text:style-name="P25"/>
      <text:p text:style-name="P31">Experienced software craftsman with a <text:span text:style-name="T4">wide variety of experience across industries, markets, and tools. Specializing </text:span>in iOS and <text:span text:style-name="T6">reactive </text:span>system design and development.</text:p>
      <text:p text:style-name="P32"/>
      <text:p text:style-name="P31">Rapid problem analysis with the ability to work with clients and end users in developing and refining requirements. Good grasp of how piece<text:span text:style-name="T11">s </text:span>client's goals and help them balance technical excellence with business objectives. Experienced with agile development methods. Ability to learn and integrate new techniques, tools, and skills quickly.<text:span text:style-name="T3"> </text:span>Able to mentor and assist team members in developing their skills.</text:p>
      <text:p text:style-name="P32"/>
      <text:p text:style-name="P16">Selected Experience<text:toc-mark text:string-value="Project Experience " text:outline-level="3"/></text:p>
      <text:p text:style-name="P17"/>
      <text:p text:style-name="P4"><text:tab/><text:span text:style-name="T5">Walmart App </text:span>(<text:span text:style-name="T5">2020-present)</text:span></text:p>
      <text:p text:style-name="P29">Working with Walmart Labs, tech lead for checkout team on new iOS eCommerce app built on a uni-directional, reactive, plug-in style architecture using Combine.</text:p>
      <text:p text:style-name="P4"><text:tab/><text:span text:style-name="T7">Sam's Club </text:span>App (201<text:span text:style-name="T7">7</text:span>-<text:span text:style-name="T6">2020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7">Work<text:span text:style-name="T9">ed</text:span> with <text:span text:style-name="T7">Sam's Club </text:span>team on iOS <text:span text:style-name="T6">eCommerce app</text:span>. <text:span text:style-name="T6">Converted app to use </text:span>RxSwift<text:span text:style-name="T7">, prepared it to move to Combine frameworks.</text:span></text:p>
      <text:p text:style-name="P4"><text:tab/>ASDA Universal App (2014-<text:span text:style-name="T7">2017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8">Work<text:span text:style-name="T10">ed</text:span> with Walmart Labs team on iOS app for their UK subsidiary, ASDA. Convert<text:span text:style-name="T9">ed </text:span>app to <text:span text:style-name="T9">use </text:span>RxSwift: rewr<text:span text:style-name="T9">ote</text:span> legacy components and <text:span text:style-name="T9">wrote </text:span>new modules.</text:p>
      <text:p text:style-name="P21"/>
      <text:p text:style-name="P18"><text:tab/>Custom <text:span text:style-name="T9">iPad</text:span> App for Physical Therapists (2016-<text:span text:style-name="T8">2019</text:span>)</text:p>
      <text:p text:style-name="P30">Develop<text:span text:style-name="T9">ed</text:span> medical app to develop individual treatment and exercises plans for physical rehabilitation patients, <text:span text:style-name="T9">using Realm to</text:span> <text:span text:style-name="T9">s</text:span>ynchroniz<text:span text:style-name="T9">aton multiple devices.</text:span></text:p>
      <text:p text:style-name="P22"/>
      <text:p text:style-name="P18"><text:tab/><text:span text:style-name="T10">Mission Control Training (2013-2014)</text:span></text:p>
      <text:p text:style-name="P31"><text:span text:style-name="T10">Developed iOS app and backend for a client's employee training business. It manages videos, assessments, and tracking and is built on Microsoft’s Azure cloud services.</text:span></text:p>
      <text:p text:style-name="P5"/>
      <text:p text:style-name="P20"><text:tab/><text:span text:style-name="T9">Custom iOS apps development and maintenance for clients </text:span>(<text:span text:style-name="T7">iOS</text:span>, <text:span text:style-name="T7">2010-2019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20"><text:tab/>Designed and developed manufacturing tracking system (Java, 2006-2012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24"><text:span text:style-name="T2"><text:tab/></text:span><text:span text:style-name="T3">DoD and DARPA projects researcher and developer (2003-2007) </text:span><text:toc-mark text:string-value="System Analysis for a multi-tier, DII-COE system (2001) " text:outline-level="4"/></text:p>
      <text:p text:style-name="P23"><text:span text:style-name="T2"><text:tab/></text:span><text:span text:style-name="T3">Adjunct Instructor for various university computer courses (1982-2006) </text:span></text:p>
      <text:p text:style-name="P11">Development Experience <text:toc-mark text:string-value="Design experience " text:outline-level="3"/></text:p>
      <text:p text:style-name="P13">iPhone, iPad, and iOS development<text:tab/><text:tab/><text:tab/><text:tab/><text:span text:style-name="T7">10</text:span>+ years</text:p>
      <text:p text:style-name="P13"><text:span text:style-name="T6">Reactive architecture design and</text:span> development<text:tab/><text:tab/><text:tab/><text:span text:style-name="T6">5</text:span>+ years</text:p>
      <text:p text:style-name="P13">Other mobile systems design and development<text:tab/><text:tab/><text:tab/>8+ years</text:p>
      <text:p text:style-name="P13">Java Desktop and Enterprise design and development<text:tab/><text:tab/>15+ years</text:p>
      <text:p text:style-name="P12">Multi-tier, distributed systems design and development<text:tab/><text:tab/>30+ years</text:p>
      <text:p text:style-name="P12">Overall professional development experience<text:tab/><text:tab/><text:tab/><text:span text:style-name="T7">40</text:span> years</text:p>
      <text:p text:style-name="P14"/>
      <text:p text:style-name="P2">Speaking and Teaching Experience 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/text:p>
      <text:p text:style-name="P12">Various conference sessions 2011-2014 (CocoaConf, 360iDev, D2Cincinnati)</text:p>
      <text:p text:style-name="P12">Regular presenter at CocoaHeads (Columbus, Cincinnati, Cleveland, Indianapolis)</text:p>
      <text:p text:style-name="P12">Co-organizer of Cincinnati CocoaDev</text:p>
      <text:p text:style-name="P12">Adjunct instructor, programming courses (Cedarville 1982-2006)</text:p>
      <text:p text:style-name="P14"/>
      <text:p text:style-name="P2">Work Experience <text:toc-mark text:string-value="Work Experience " text:outline-level="3"/><text:toc-mark text:string-value="Work Experience " text:outline-level="3"/></text:p>
      <text:p text:style-name="P15">Independent<text:tab/><text:tab/>1998-present<text:tab/>Independent software craftsman</text:p>
      <text:p text:style-name="P6">Synergy, Inc.<text:tab/><text:tab/>1996‑1998<text:tab/>Software design and development</text:p>
      <text:p text:style-name="P6">Rotman &amp; Sjoquist<text:tab/>1988-1996<text:tab/>Extensive consulting and programming in a partnership</text:p>
      <text:p text:style-name="P6">Cedarville College<text:tab/>1982‑1996<text:tab/>Various roles ending with Asst. Dir. of Computer Services</text:p>
      <text:p text:style-name="P6"><text:tab/><text:tab/><text:tab/><text:tab/><text:tab/>Adjunct Instructor, computer language courses</text:p>
      <text:p text:style-name="P6">Independent<text:tab/><text:tab/>1980-1988<text:tab/>Custom software development for various businesses.</text:p>
      <text:p text:style-name="P1"/>
      <text:p text:style-name="P2">Education <text:toc-mark text:string-value="Education " text:outline-level="3"/></text:p>
      <text:p text:style-name="P9">B.A. Business Administration, Cedarville College, June 1982</text:p>
      <text:p text:style-name="P9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officeooo:rsid="001b8145"/>
    </style:style>
    <style:style style:name="MT4" style:family="text">
      <style:text-properties officeooo:rsid="001733cb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uglas W. Sjoquist<text:tab/></text:span><text:a xlink:type="simple" xlink:href="mailto:dwSjoquist@sunetos.com" text:style-name="Internet_20_link" text:visited-style-name="Visited_20_Internet_20_Link"><text:span text:style-name="Internet_20_link"><text:span text:style-name="MT2">dwsjoquist@sunetos.com</text:span></text:span></text:a><text:span text:style-name="MT1"><text:tab/></text:span><text:span text:style-name="MT2">www.sunetos.com</text:span></text:p>
        <text:p text:style-name="MP2"><text:span text:style-name="MT3">May</text:span> 202<text:span text:style-name="MT4">1</text:span></text:p>
      </style:header>
      <style:footer>
        <text:p text:style-name="MP3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27$MacOSX_X86_64 NeoOffice_project/0</meta:generator>
    <dc:title>Douglas W</dc:title>
    <meta:initial-creator>Douglas W Sjoquist</meta:initial-creator>
    <meta:creation-date>2006-05-12T21:25:00</meta:creation-date>
    <dc:date>2021-04-21T18:31:01.042498386</dc:date>
    <dc:language>en-US</dc:language>
    <meta:editing-cycles>90</meta:editing-cycles>
    <meta:editing-duration>PT13H34M39S</meta:editing-duration>
    <meta:print-date>2011-11-03T17:08:36</meta:print-date>
    <meta:document-statistic meta:table-count="0" meta:image-count="0" meta:object-count="0" meta:page-count="2" meta:paragraph-count="43" meta:word-count="407" meta:character-count="3052" meta:non-whitespace-character-count="2653"/>
    <meta:user-defined meta:name="Info 1"/>
    <meta:user-defined meta:name="Info 2"/>
    <meta:user-defined meta:name="Info 3"/>
    <meta:user-defined meta:name="Info 4"/>
  </office:meta>
</office:document-meta>
</file>