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paragraph-properties fo:line-height="100%"/>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line-height="100%"/>
      <style:text-properties fo:font-size="12pt" fo:font-weight="bold" style:font-size-asian="12pt" style:font-weight-asian="bold" style:font-size-complex="12pt" style:font-weight-complex="bold"/>
    </style:style>
    <style:style style:name="P6" style:family="paragraph" style:parent-style-name="Standard">
      <style:paragraph-properties>
        <style:tab-stops>
          <style:tab-stop style:position="6.5in" style:type="right"/>
        </style:tab-stops>
      </style:paragraph-properties>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ab-stops>
          <style:tab-stop style:position="6.5in" style:type="right"/>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_32_Definitions">
      <style:paragraph-properties fo:text-align="start" style:justify-single-word="false"/>
    </style:style>
    <style:style style:name="P16" style:family="paragraph" style:parent-style-name="Standard" style:master-page-name="Standard">
      <style:paragraph-properties style:page-number="auto">
        <style:tab-stops>
          <style:tab-stop style:position="6.5in" style:type="right"/>
        </style:tab-stops>
      </style:paragraph-properties>
    </style:style>
    <style:style style:name="P1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Douglas W. Sjoquist<text:tab/></text:span><text:a xlink:type="simple" xlink:href="mailto:dwSjoquist@sunetos.com"><text:span text:style-name="Internet_20_link"><text:span text:style-name="T2">dwsjoquist@sunetos.com</text:span></text:span></text:a></text:p>
      <text:p text:style-name="P6"><text:span text:style-name="T1">Sunetos, Inc.<text:tab/></text:span><text:span text:style-name="T2">www.sunetos.com</text:span></text:p>
      <text:p text:style-name="P2">January 2011</text:p>
      <text:p text:style-name="P4"/>
      <text:p text:style-name="P4">Summary <text:toc-mark text:string-value="Summary " text:outline-level="3"/></text:p>
      <text:p text:style-name="P11"/>
      <text:p text:style-name="P11">Experienced software craftsman with a strong background on mobile devices and multitier distributed system design and development.</text:p>
      <text:p text:style-name="P11"/>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development techniques, tools, and skills quickly.</text:p>
      <text:p text:style-name="P1"/>
      <text:p text:style-name="P1"/>
      <text:p text:style-name="P4">Project Experience<text:toc-mark text:string-value="Project Experience " text:outline-level="3"/></text:p>
      <text:p text:style-name="P4"/>
      <text:p text:style-name="P8"><text:tab/>iPhone musician fan app (current projec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ing iPhone app for fans of individual musicians. <text:s/>Some key features: Cover Flow style access to current discography; cross links from discography to artist and user supplied videos, cross links from discography to artist blog entries; links to artist's twitter feeds, concert schedules, and other news. </text:p>
      <text:p text:style-name="P4"/>
      <text:p text:style-name="P8"><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framework to integrate the SDK for the LineaPRO barcode and magnetic card reader with UIWebView. <text:s/>This allowed the client to use web developers to write iPod Touch specific webpages to access the underlying hardware without the need to write any Objective-C code.</text:p>
      <text:p text:style-name="P11"/>
      <text:p text:style-name="P8"><text:tab/>Prototype iPhone applications for local university (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1">Developed iPhone applications and demonstrations for local university for integration experiments between the iPhone and their backend services. <text:s/>Worked with them to evaluate their needs to help them create their mobile device development roadmap.</text:p>
      <text:p text:style-name="P11"/>
      <text:p text:style-name="P11"/>
      <text:p text:style-name="P8"><text:soft-page-break/><text:tab/>Recycling and manufacturing tracking system (2006-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1">Primary architect and lead developer for a system to support the a major recycling business for a manufacturing client. <text:s text:c="2"/>The system is written in Java using a mixture of open source and proprietary components, using DB2 and Glassfish for the backend.</text:p>
      <text:p text:style-name="P11"/>
      <text:p text:style-name="P7"><text:span text:style-name="T2"><text:tab/></text:span><text:span text:style-name="T3">DoD Humanitarian Aid and Disaster Relief planning system protoype (2006-2007) </text:span><text:toc-mark text:string-value="System Analysis for a multi-tier, DII-COE system (2001) " text:outline-level="4"/><text:span text:style-name="T3"/></text:p>
      <text:p text:style-name="P11">Worked as researcher and developer on a prototype Humanitarian Aid and Disaster Relief planning system for the DoD. <text:s/>Developed module that allowed web users to collaboratively build, approve, and publish initial planning documents and briefings. <text:s/>Researched use of semantic web concepts (ontologies, OWL, Protege') in support of the process.</text:p>
      <text:p text:style-name="P11"/>
      <text:p text:style-name="P8"><text:tab/>DARPA Software agent research prototype (2004-2005) <text:toc-mark text:string-value="System Analysis for a multi-tier, DII-COE system (2001) " text:outline-level="4"/></text:p>
      <text:p text:style-name="P11">Designed and developed Java subsystems for a proof of concept distributed agent system: rule engine subsystem, end-user rule builder GUI, tracking subsystem, other subsystem APIs, and system utilities. <text:s/>Mentored team members in J2EE design, Java patterns, and refactoring. <text:s/>Worked with client representatives in developing roadmap for overall project.</text:p>
      <text:p text:style-name="P11"/>
      <text:p text:style-name="P7"><text:span text:style-name="T2"><text:tab/></text:span><text:span text:style-name="T3">US Navy configurable real time engine data display (2003)</text:span></text:p>
      <text:p text:style-name="P11">Developed prototype system to provide a user configurable display system for an integrated bridge system for Navy small boats. <text:s/>The system monitors and displays real time data feeds from multiple engines in text or graphics mode.</text:p>
      <text:p text:style-name="P9"><text:span text:style-name="T1">Douglas W. Sjoquist<text:tab/></text:span><text:a xlink:type="simple" xlink:href="mailto:dwSjoquist@sunetos.com"><text:span text:style-name="Internet_20_link"><text:span text:style-name="T2">dwsjoquist@sunetos.com</text:span></text:span></text:a></text:p>
      <text:p text:style-name="P6"><text:span text:style-name="T1">Sunetos, Inc.<text:tab/></text:span><text:span text:style-name="T2">www.sunetos.com</text:span></text:p>
      <text:p text:style-name="P2">January 2011</text:p>
      <text:p text:style-name="P1"/>
      <text:p text:style-name="P5">Development experience <text:toc-mark text:string-value="Design experience " text:outline-level="3"/></text:p>
      <text:p text:style-name="P13">iPhone, iPad, and iOS development<text:tab/><text:tab/><text:tab/><text:tab/>1+ years</text:p>
      <text:p text:style-name="P13">JEE, Java Enterprise Edition design and development<text:tab/><text:tab/>11 years</text:p>
      <text:p text:style-name="P13">Web Services design and development<text:tab/><text:tab/><text:tab/><text:tab/>5 years</text:p>
      <text:p text:style-name="P13">Multitier, distributed systems design and development<text:tab/><text:tab/>15 years</text:p>
      <text:p text:style-name="P13">Other mobile systems design and development<text:tab/><text:tab/><text:tab/>4 years</text:p>
      <text:p text:style-name="P13">Overall professional development experience<text:tab/><text:tab/><text:tab/>30 years</text:p>
      <text:p text:style-name="P14"/>
      <text:p text:style-name="P5">Selected Language and Tool experience <text:toc-mark text:string-value="Languages and Tools experience " text:outline-level="3"/><text:toc-mark text:string-value="Languages and Tools experience " text:outline-level="3"/></text:p>
      <text:p text:style-name="P13">Mobile: iOS, Android, J2ME, WinCE</text:p>
      <text:p text:style-name="P13">Server: WebSphere, Weblogic, Glassfish, JBoss, TIBCO </text:p>
      <text:p text:style-name="P13">Database: Oracle, Microsoft SQL Server, DB2, MySQL</text:p>
      <text:p text:style-name="P13">Languages: Objective-C, Java, C/C++, Delphi</text:p>
      <text:p text:style-name="P3"/>
      <text:p text:style-name="P5">Work Experience <text:toc-mark text:string-value="Work Experience " text:outline-level="3"/></text:p>
      <text:p text:style-name="P10">Sunetos, Inc.<text:tab/><text:tab/>1998-present<text:tab/>Independent software craftsman</text:p>
      <text:p text:style-name="P10">ICF International<text:tab/>2006-2010<text:tab/>Software development consultant</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Cedarville College<text:tab/>1985‑1994<text:tab/>Adjunct Instructor, computer language courses</text:p>
      <text:p text:style-name="P10">Custom development<text:tab/>1980-1988<text:tab/>Custom software development for various businesses.</text:p>
      <text:p text:style-name="P3"/>
      <text:p text:style-name="P5">Education <text:toc-mark text:string-value="Education " text:outline-level="3"/></text:p>
      <text:p text:style-name="P12">B.A. Business Administration, Cedarville College, June 1982, GPA 3.5/4.0</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01-18T17:00:23</dc:date>
    <dc:language>en-US</dc:language>
    <meta:editing-cycles>32</meta:editing-cycles>
    <meta:editing-duration>PT02H27M09S</meta:editing-duration>
    <meta:print-date>2010-11-30T17:18:33</meta:print-date>
    <meta:document-statistic meta:table-count="0" meta:image-count="0" meta:object-count="0" meta:page-count="3" meta:paragraph-count="47" meta:word-count="614" meta:character-count="4287"/>
    <meta:user-defined meta:name="Info 1"/>
    <meta:user-defined meta:name="Info 2"/>
    <meta:user-defined meta:name="Info 3"/>
    <meta:user-defined meta:name="Info 4"/>
  </office:meta>
</office:document-meta>
</file>