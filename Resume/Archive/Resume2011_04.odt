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2pt" style:font-size-asian="12pt" style:font-size-complex="12pt"/>
    </style:style>
    <style:style style:name="P2" style:family="paragraph" style:parent-style-name="Standard">
      <style:paragraph-properties fo:line-height="100%"/>
      <style:text-properties fo:font-size="12pt" style:font-size-asian="12pt" style:font-size-complex="12pt"/>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paragraph-properties fo:line-height="100%"/>
      <style:text-properties fo:font-size="12pt" fo:font-weight="bold" style:font-size-asian="12pt" style:font-weight-asian="bold" style:font-size-complex="12pt" style:font-weight-complex="bold"/>
    </style:style>
    <style:style style:name="P5" style:family="paragraph" style:parent-style-name="Standard">
      <style:paragraph-properties fo:line-height="0.1in"/>
      <style:text-properties fo:font-size="12pt" fo:font-weight="bold" style:font-size-asian="12pt" style:font-weight-asian="bold" style:font-size-complex="12pt" style:font-weight-complex="bold"/>
    </style:style>
    <style:style style:name="P6" style:family="paragraph" style:parent-style-name="Footer">
      <style:paragraph-properties fo:text-align="center" style:justify-single-word="false"/>
    </style:style>
    <style:style style:name="P7"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style>
    <style:style style:name="P8"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9" style:family="paragraph" style:parent-style-name="Standard">
      <style:paragraph-properties fo:margin-left="2.5in" fo:margin-right="0in" fo:line-height="100%" fo:text-indent="-2.5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0" style:family="paragraph" style:parent-style-name="_32_Definitions">
      <style:paragraph-properties fo:text-align="start" style:justify-single-word="false"/>
    </style:style>
    <style:style style:name="P11" style:family="paragraph" style:parent-style-name="_32_Definitions">
      <style:paragraph-properties fo:line-height="100%" fo:text-align="start" style:justify-single-word="false"/>
    </style:style>
    <style:style style:name="P12" style:family="paragraph" style:parent-style-name="_32_Definitions">
      <style:paragraph-properties fo:text-align="start" style:justify-single-word="false"/>
      <style:text-properties fo:color="#000000" style:font-name="TimesNewRomanPSMT" fo:font-size="12pt" style:font-name-asian="TimesNewRomanPSMT" style:font-size-asian="12pt" style:font-name-complex="TimesNewRomanPSMT" style:font-size-complex="12pt"/>
    </style:style>
    <style:style style:name="P13"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style>
    <style:style style:name="P14"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text-properties fo:font-size="12pt" style:font-size-asian="12pt" style:font-size-complex="12pt"/>
    </style:style>
    <style:style style:name="P15" style:family="paragraph" style:parent-style-name="Standard">
      <style:paragraph-properties fo:line-height="100%" fo:break-before="page"/>
      <style:text-properties fo:font-size="12pt" fo:font-weight="bold" style:font-size-asian="12pt" style:font-weight-asian="bold" style:font-size-complex="12pt" style:font-weight-complex="bold"/>
    </style:style>
    <style:style style:name="P16" style:family="paragraph" style:parent-style-name="Standard">
      <style:paragraph-properties fo:margin-left="0in" fo:margin-right="0in" fo:line-height="100%"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7" style:family="paragraph" style:parent-style-name="Standard" style:master-page-name="Standard">
      <style:paragraph-properties style:page-number="auto">
        <style:tab-stops>
          <style:tab-stop style:position="6.5in" style:type="right"/>
        </style:tab-stops>
      </style:paragraph-properties>
    </style:style>
    <style:style style:name="P18" style:family="paragraph" style:parent-style-name="Standard" style:master-page-name="Standard">
      <style:paragraph-properties style:page-number="auto"/>
      <style:text-properties fo:font-size="12pt" fo:font-weight="bold" style:font-size-asian="12pt" style:font-weight-asian="bold" style:font-size-complex="12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ummary <text:toc-mark text:string-value="Summary " text:outline-level="3"/></text:p>
      <text:p text:style-name="P5"/>
      <text:p text:style-name="P10">Experienced software craftsman with a strong background on mobile devices and multitier distributed system design and development.</text:p>
      <text:p text:style-name="P5"/>
      <text:p text:style-name="P10">Rapid problem analysis with the ability to work with clients and end users in developing and refining requirements. Good grasp of how each piece fits in with client's overall goals and needs. <text:s/>Experienced and comfortable with agile development methods. <text:s/>Ability to learn and integrate new development techniques, tools, and skills quickly.</text:p>
      <text:p text:style-name="P10"/>
      <text:p text:style-name="P5"/>
      <text:p text:style-name="P3">Project Experience<text:toc-mark text:string-value="Project Experience " text:outline-level="3"/></text:p>
      <text:p text:style-name="P5"/>
      <text:p text:style-name="P8"><text:tab/>Schedule and Information app (Sun 'n Fun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a universal iPad/iPhone app for a client that includes multiple event schedules, exhibitor information and external links, convention maps and other information for those attending with the ability for attendees to mark favorites.</text:p>
      <text:p text:style-name="P5"/>
      <text:p text:style-name="P8"><text:tab/>iOS framework to embed quizzes into training apps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a framework that allows a client to build a bank of questions, videos, and images that can be integrated into an app, allowing the user to test their understanding of the material.</text:p>
      <text:p text:style-name="P5"/>
      <text:p text:style-name="P8"><text:tab/>Certification review app (in development)<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2">Modifying an existing universal training app for a client to use the quiz and test bank framework. Current app has training materials, primarily video, for reviewing for a federal certification. <text:s/>The client's in-house developers will use this app as a model to integrate the quiz framework into their other apps.</text:p>
      <text:p text:style-name="P5"/>
      <text:p text:style-name="P8"><text:tab/>iPhone musician fan app (in development)<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ing iPhone app for fans of individual musicians. <text:s/>Some key features: Cover Flow style view of discography; cross links from discography to artist and user supplied videos, artist blog entries, twitter feeds, concert schedules, and other news. </text:p>
      <text:p text:style-name="P5"/>
      <text:p text:style-name="P8"><text:soft-page-break/><text:tab/>iOS framework to integrate LineaPro SDK with UIWebView (2010)<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framework to integrate the SDK for the LineaPRO barcode and magnetic card reader (an <text:s/>attached device) with UIWebView. <text:s/>This allowed the client to use web developers to write iPod Touch specific webpages to access the underlying hardware without the need to write any Objective-C code.</text:p>
      <text:p text:style-name="P5"/>
      <text:p text:style-name="P8"><text:tab/>Prototype iPhone applications for local university (2010)<text:toc-mark text:string-value="System Analysis for a multi-tier, DII-COE system (2001) " text:outline-level="4"/><text:toc-mark text:string-value="System Analysis for a multi-tier, DII-COE system (2001) " text:outline-level="4"/><text:span text:style-name="T3"/><text:toc-mark text:string-value="System Analysis for a multi-tier, DII-COE system (2001) " text:outline-level="4"/><text:toc-mark text:string-value="System Analysis for a multi-tier, DII-COE system (2001) " text:outline-level="4"/></text:p>
      <text:p text:style-name="P10">Developed iPhone applications and demonstrations for local university for integration experiments between the iPhone and their backend services. <text:s/>Worked with them to evaluate their needs to help them create their mobile device development roadmap.</text:p>
      <text:p text:style-name="P5"/>
      <text:p text:style-name="P8"><text:tab/>Recycling and manufacturing tracking system (2006-2010)<text:toc-mark text:string-value="System Analysis for a multi-tier, DII-COE system (2001) " text:outline-level="4"/><text:toc-mark text:string-value="System Analysis for a multi-tier, DII-COE system (2001) " text:outline-level="4"/><text:span text:style-name="T3"/><text:toc-mark text:string-value="System Analysis for a multi-tier, DII-COE system (2001) " text:outline-level="4"/><text:toc-mark text:string-value="System Analysis for a multi-tier, DII-COE system (2001) " text:outline-level="4"/></text:p>
      <text:p text:style-name="P10">Primary architect and lead developer for a system to support the major recycling business of a manufacturing client. <text:s text:c="2"/>The system is written in Java using a mixture of open source and proprietary components, using DB2 and Glassfish for the backend.</text:p>
      <text:p text:style-name="P5"/>
      <text:p text:style-name="P7"><text:span text:style-name="T2"><text:tab/></text:span><text:span text:style-name="T3">DoD Humanitarian Aid and Disaster Relief planning system protoype (2006-2007) </text:span><text:toc-mark text:string-value="System Analysis for a multi-tier, DII-COE system (2001) " text:outline-level="4"/><text:span text:style-name="T3"/></text:p>
      <text:p text:style-name="P10">Worked as researcher and developer on a prototype Humanitarian Aid and Disaster Relief planning system for the DoD. Researched use of semantic web concepts (ontologies, OWL, Protege') in support of the process.</text:p>
      <text:p text:style-name="P5"/>
      <text:p text:style-name="P8"><text:tab/>DARPA Software agent research prototype (2004-2005) <text:toc-mark text:string-value="System Analysis for a multi-tier, DII-COE system (2001) " text:outline-level="4"/></text:p>
      <text:p text:style-name="P10">Designed and developed Java subsystems for a proof of concept distributed agent system: rule engine subsystem, end-user rule builder GUI, <text:s/>and tracking subsystem. <text:s/>Mentored team members in J2EE design, Java patterns, and refactoring. <text:s/>Worked with client representatives in developing roadmap for overall project.</text:p>
      <text:p text:style-name="P5"/>
      <text:p text:style-name="P7"><text:span text:style-name="T2"><text:tab/></text:span><text:span text:style-name="T3">US Navy configurable real time engine data display (2003)</text:span></text:p>
      <text:p text:style-name="P10">Developed prototype system to provide a user configurable display system for an integrated bridge system for Navy small boats. <text:s/>The system monitored and displayed real time data feeds from multiple engines in text or graphics mode.</text:p>
      <text:p text:style-name="P15">Development experience <text:toc-mark text:string-value="Design experience " text:outline-level="3"/></text:p>
      <text:p text:style-name="P13">iPhone, iPad, and iOS development<text:tab/><text:tab/><text:tab/><text:tab/>2 years</text:p>
      <text:p text:style-name="P13">Other mobile systems design and development<text:tab/><text:tab/><text:tab/>4 years</text:p>
      <text:p text:style-name="P13">Java Desktop and Enterprise design and development<text:tab/><text:tab/>10+ years</text:p>
      <text:p text:style-name="P13">Multitier, distributed systems design and development<text:tab/><text:tab/>20+ years</text:p>
      <text:p text:style-name="P13">Overall professional development experience<text:tab/><text:tab/><text:tab/>30+ years</text:p>
      <text:p text:style-name="P14"/>
      <text:p text:style-name="P4">Selected Language and Tool experience <text:toc-mark text:string-value="Languages and Tools experience " text:outline-level="3"/><text:toc-mark text:string-value="Languages and Tools experience " text:outline-level="3"/></text:p>
      <text:p text:style-name="P13">Mobile: iOS, Android, J2ME, WinCE</text:p>
      <text:p text:style-name="P13">Server: WebSphere, Weblogic, Glassfish, JBoss, TIBCO </text:p>
      <text:p text:style-name="P13">Database: Oracle, Microsoft SQL Server, DB2, MySQL</text:p>
      <text:p text:style-name="P13">Languages: Objective-C, Java, C/C++, Delphi</text:p>
      <text:p text:style-name="P2"/>
      <text:p text:style-name="P4">Work Experience <text:toc-mark text:string-value="Work Experience " text:outline-level="3"/></text:p>
      <text:p text:style-name="P16">Independent<text:tab/><text:tab/>1998-present<text:tab/>Independent software craftsman</text:p>
      <text:p text:style-name="P9">Synergy, Inc.<text:tab/><text:tab/>1996‑1998<text:tab/>Software design and development</text:p>
      <text:p text:style-name="P9">Rotman &amp; Sjoquist<text:tab/>1988-1996<text:tab/>Extensive consulting and programming in a partnership</text:p>
      <text:p text:style-name="P9">Cedarville College<text:tab/>1982‑1996<text:tab/>Various roles ending with Asst. Dir. of Computer Services</text:p>
      <text:p text:style-name="P9"><text:tab/><text:tab/><text:tab/><text:tab/><text:tab/>Adjunct Instructor, computer language courses</text:p>
      <text:p text:style-name="P9">Independent<text:tab/><text:tab/>1980-1988<text:tab/>Custom software development for various businesses.</text:p>
      <text:p text:style-name="P2"/>
      <text:p text:style-name="P4">Education <text:toc-mark text:string-value="Education " text:outline-level="3"/></text:p>
      <text:p text:style-name="P11">B.A. Business Administration, Cedarville College, June 1982</text:p>
      <text:p text:style-name="P11">Computer Information Systems 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25in" fo:text-align="justify" style:justify-single-word="false" fo:orphans="0" fo:widows="0" style:text-autospace="none" style:vertical-align="baseline"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_31_Bullets" style:display-name="1Bullets" style:family="paragraph">
      <style:paragraph-properties fo:margin-left="0.5in" fo:margin-right="0in" style:line-height-at-least="0.25in" fo:text-align="justify" style:justify-single-word="false" fo:orphans="0" fo:widows="0" fo:text-indent="-0.5in" style:auto-text-indent="false" style:text-autospace="none" style:vertical-align="baseline">
        <style:tab-stops>
          <style:tab-stop style:position="0in"/>
        </style:tab-stops>
      </style:paragraph-properties>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2_Bullets" style:display-name="2Bullets" style:family="paragraph">
      <style:paragraph-properties fo:margin-left="1in" fo:margin-right="0in" style:line-height-at-least="0.25in" fo:text-align="justify" style:justify-single-word="false" fo:orphans="0" fo:widows="0" fo:text-indent="-0.5in" style:auto-text-indent="false" style:text-autospace="none" style:vertical-align="baseline">
        <style:tab-stops>
          <style:tab-stop style:position="-0.5in"/>
          <style:tab-stop style:position="0in"/>
        </style:tab-stops>
      </style:paragraph-properties>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3_Bullets" style:display-name="3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4_Bullets" style:display-name="4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5_Bullets" style:display-name="5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6_Bullets" style:display-name="6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7_Bullets" style:display-name="7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8_Bullets" style:display-name="8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1_Definitions" style:display-name="1Definitions" style:family="paragraph">
      <style:paragraph-properties style:line-height-at-least="0.25in" fo:text-align="justify" style:justify-single-word="false" fo:orphans="0" fo:widows="0"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2_Definitions" style:display-name="2Definitions" style:family="paragraph">
      <style:paragraph-properties fo:margin-left="0.6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3_Definitions" style:display-name="3Definitions" style:family="paragraph">
      <style:paragraph-properties fo:margin-left="1.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4_Definitions" style:display-name="4Definitions" style:family="paragraph">
      <style:paragraph-properties fo:margin-left="1.5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5_Definitions" style:display-name="5Definitions" style:family="paragraph">
      <style:paragraph-properties fo:margin-left="2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6_Definitions" style:display-name="6Definitions" style:family="paragraph">
      <style:paragraph-properties fo:margin-left="2.4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7_Definitions" style:display-name="7Definitions" style:family="paragraph">
      <style:paragraph-properties fo:margin-left="2.9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8_Definitions" style:display-name="8Definitions" style:family="paragraph">
      <style:paragraph-properties fo:margin-left="3.3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style:page-number="auto">
        <style:tab-stops>
          <style:tab-stop style:position="6.5in" style:type="right"/>
        </style:tab-stops>
      </style:paragraph-properties>
    </style:style>
    <style:style style:name="MP2" style:family="paragraph" style:parent-style-name="Standard">
      <style:paragraph-properties fo:text-align="end" style:justify-single-word="false"/>
      <style:text-properties fo:font-size="12pt" style:font-size-asian="12pt" style:font-size-complex="12pt"/>
    </style:style>
    <style:style style:name="MP3" style:family="paragraph" style:parent-style-name="Footer">
      <style:paragraph-properties fo:text-align="center" style:justify-single-word="false"/>
    </style:style>
    <style:style style:name="MT1" style:family="text">
      <style:text-properties fo:font-size="14pt" fo:font-weight="bold" style:font-size-asian="14pt" style:font-weight-asian="bold" style:font-size-complex="14pt" style:font-weight-complex="bold"/>
    </style:style>
    <style:style style:name="MT2" style:family="text">
      <style:text-properties fo:font-size="12pt" style:font-size-asian="12pt" style:font-size-complex="12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Douglas W. Sjoquist<text:tab/></text:span><text:a xlink:type="simple" xlink:href="mailto:dwSjoquist@sunetos.com"><text:span text:style-name="Internet_20_link"><text:span text:style-name="MT2">dwsjoquist@sunetos.com</text:span></text:span></text:a><text:span text:style-name="MT1"><text:tab/></text:span><text:span text:style-name="MT2">www.sunetos.com</text:span></text:p>
        <text:p text:style-name="MP2">April 2011</text:p>
      </style:header>
      <style:footer>
        <text:p text:style-name="MP3">Page <text:page-number text:select-page="current">2</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1.2$Unix OpenOffice.org_project/Patch 0</meta:generator>
    <dc:title>Douglas W</dc:title>
    <meta:initial-creator>Douglas W Sjoquist</meta:initial-creator>
    <meta:creation-date>2006-05-12T21:25:00</meta:creation-date>
    <dc:date>2011-04-28T11:24:27</dc:date>
    <dc:language>en-US</dc:language>
    <meta:editing-cycles>40</meta:editing-cycles>
    <meta:editing-duration>PT03H34M57S</meta:editing-duration>
    <meta:print-date>2011-04-09T11:33:49</meta:print-date>
    <meta:document-statistic meta:table-count="0" meta:image-count="0" meta:object-count="0" meta:page-count="3" meta:paragraph-count="48" meta:word-count="713" meta:character-count="4745"/>
    <meta:user-defined meta:name="Info 1"/>
    <meta:user-defined meta:name="Info 2"/>
    <meta:user-defined meta:name="Info 3"/>
    <meta:user-defined meta:name="Info 4"/>
  </office:meta>
</office:document-meta>
</file>