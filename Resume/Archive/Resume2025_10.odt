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 style:family="paragraph" style:parent-style-name="Standard">
      <style:paragraph-properties fo:line-height="0.0835in" style:writing-mode="lr-tb"/>
      <style:text-properties fo:font-size="12pt" fo:font-weight="bold" style:font-size-asian="12pt" style:font-weight-asian="bold" style:font-size-complex="12pt" style:font-weight-complex="bold"/>
    </style:style>
    <style:style style:name="P3" style:family="paragraph" style:parent-style-name="Standard" style:master-page-name="">
      <loext:graphic-properties draw:fill="none"/>
      <style:paragraph-properties fo:margin-left="0.3752in" fo:margin-right="0in" style:line-height-at-least="0.25in" fo:text-align="start" style:justify-single-word="false" fo:orphans="0" fo:widows="0" fo:text-indent="0in" style:auto-text-indent="false" style:page-number="auto" fo:background-color="transparent" style:text-autospace="none" style:vertical-align="baseline" style:writing-mode="lr-tb"/>
      <style:text-properties fo:font-size="12pt" style:font-size-asian="12pt" style:font-size-complex="12pt"/>
    </style:style>
    <style:style style:name="P4" style:family="paragraph" style:parent-style-name="Standard">
      <loext:graphic-properties draw:fill="none"/>
      <style:paragraph-properties fo:margin-left="0.3752in" fo:margin-right="0in" fo:line-height="0.1in" fo:text-align="start" style:justify-single-word="false" fo:orphans="0" fo:widows="0" fo:text-indent="0in" style:auto-text-indent="false" fo:background-color="transparent" style:text-autospace="none" style:vertical-align="baseline" style:writing-mode="lr-tb"/>
      <style:text-properties fo:font-size="12pt" style:font-size-asian="12pt" style:font-size-complex="12pt"/>
    </style:style>
    <style:style style:name="P5" style:family="paragraph" style:parent-style-name="Standard">
      <loext:graphic-properties draw:fill="none"/>
      <style:paragraph-properties fo:margin-left="0.3752in" fo:margin-right="0in" style:line-height-at-least="0.25in" fo:text-align="start" style:justify-single-word="false" fo:orphans="0" fo:widows="0" fo:text-indent="0in" style:auto-text-indent="false" fo:background-color="transparent" style:text-autospace="none" style:vertical-align="baseline" style:writing-mode="lr-tb"/>
      <style:text-properties fo:font-size="12pt" style:font-size-asian="12pt" style:font-size-complex="12pt"/>
    </style:style>
    <style:style style:name="P6" style:family="paragraph" style:parent-style-name="_32_Definitions">
      <style:paragraph-properties fo:line-height="0.0835in" fo:text-align="start" style:justify-single-word="false" style:writing-mode="lr-tb"/>
      <style:text-properties officeooo:paragraph-rsid="001b8145"/>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paragraph-properties fo:line-height="0.1in"/>
      <style:text-properties fo:font-size="12pt" fo:font-weight="bold" style:font-size-asian="12pt" style:font-weight-asian="bold" style:font-size-complex="12pt" style:font-weight-complex="bold"/>
    </style:style>
    <style:style style:name="P9"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e16ff" style:font-size-asian="12pt" style:font-weight-asian="bold" style:font-size-complex="12pt" style:font-weight-complex="bold"/>
    </style:style>
    <style:style style:name="P10" style:family="paragraph" style:parent-style-name="_32_Definitions">
      <style:paragraph-properties fo:text-align="start" style:justify-single-word="false"/>
      <style:text-properties officeooo:rsid="001e16ff" officeooo:paragraph-rsid="001e16ff"/>
    </style:style>
    <style:style style:name="P11" style:family="paragraph" style:parent-style-name="_32_Definitions">
      <style:paragraph-properties fo:text-align="start" style:justify-single-word="false"/>
      <style:text-properties officeooo:rsid="001b8145" officeooo:paragraph-rsid="001e16ff"/>
    </style:style>
    <style:style style:name="P12" style:family="paragraph" style:parent-style-name="_32_Definitions">
      <style:paragraph-properties fo:text-align="start" style:justify-single-word="false"/>
      <style:text-properties officeooo:paragraph-rsid="001733cb"/>
    </style:style>
    <style:style style:name="P13"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733cb" style:font-size-asian="12pt" style:font-weight-asian="bold" style:font-size-complex="12pt" style:font-weight-complex="bold"/>
    </style:style>
    <style:style style:name="P14" style:family="paragraph" style:parent-style-name="_32_Definitions">
      <style:paragraph-properties fo:text-align="start" style:justify-single-word="false"/>
      <style:text-properties officeooo:paragraph-rsid="00148e97"/>
    </style:style>
    <style:style style:name="P15"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16"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1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officeooo:paragraph-rsid="00148e97"/>
    </style:style>
    <style:style style:name="P1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19"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20"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officeooo:paragraph-rsid="0017197b"/>
    </style:style>
    <style:style style:name="P21"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22"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23" style:family="paragraph" style:parent-style-name="Standard">
      <style:paragraph-properties fo:line-height="100%"/>
      <style:text-properties fo:font-size="12pt" fo:font-weight="bold" style:font-size-asian="12pt" style:font-weight-asian="bold" style:font-size-complex="12pt" style:font-weight-complex="bold"/>
    </style:style>
    <style:style style:name="P2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officeooo:rsid="0021d5a0" officeooo:paragraph-rsid="0021d5a0"/>
    </style:style>
    <style:style style:name="P25"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officeooo:paragraph-rsid="0021d5a0"/>
    </style:style>
    <style:style style:name="P2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officeooo:rsid="0021d5a0" officeooo:paragraph-rsid="0021d5a0" style:font-size-asian="12pt" style:font-size-complex="12pt"/>
    </style:style>
    <style:style style:name="P27"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officeooo:paragraph-rsid="0021d5a0" style:font-size-asian="12pt" style:font-size-complex="12pt"/>
    </style:style>
    <style:style style:name="P28"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29" style:family="paragraph" style:parent-style-name="Standard">
      <style:paragraph-properties fo:line-height="100%"/>
      <style:text-properties fo:font-size="12pt" style:font-size-asian="12pt" style:font-size-complex="12pt"/>
    </style:style>
    <style:style style:name="P30" style:family="paragraph" style:parent-style-name="_32_Definitions">
      <style:paragraph-properties fo:line-height="100%" fo:text-align="start" style:justify-single-word="false"/>
    </style:style>
    <style:style style:name="T1" style:family="text">
      <style:text-properties officeooo:rsid="001e16ff"/>
    </style:style>
    <style:style style:name="T2" style:family="text">
      <style:text-properties officeooo:rsid="001733cb"/>
    </style:style>
    <style:style style:name="T3" style:family="text">
      <style:text-properties officeooo:rsid="00208bd2"/>
    </style:style>
    <style:style style:name="T4" style:family="text">
      <style:text-properties officeooo:rsid="001f2503"/>
    </style:style>
    <style:style style:name="T5" style:family="text">
      <style:text-properties officeooo:rsid="00148e97"/>
    </style:style>
    <style:style style:name="T6" style:family="text">
      <style:text-properties officeooo:rsid="0017197b"/>
    </style:style>
    <style:style style:name="T7" style:family="text">
      <style:text-properties officeooo:rsid="001985dd"/>
    </style:style>
    <style:style style:name="T8" style:family="text">
      <style:text-properties officeooo:rsid="001b8145"/>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officeooo:rsid="0021d5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mary <text:toc-mark text:string-value="Summary " text:outline-level="3"/></text:p>
      <text:p text:style-name="P2"/>
      <text:p text:style-name="P3">Experienced iOS developer specializing in application architecture and turning business problems into working solutions—from Fortune 100 companies to small startups.</text:p>
      <text:p text:style-name="P4"/>
      <text:p text:style-name="P5">Quick to understand client needs and balance technical excellence with business objectives. Strong track record leading teams, mentoring developers, and working as an individual contributor. Experienced with agile methodologies and adept at learning new tools and techniques.</text:p>
      <text:p text:style-name="P4"/>
      <text:p text:style-name="P5">Skilled at working directly with clients and end users to develop and refine requirements, then building implementation plans that achieve their goals within budget.</text:p>
      <text:p text:style-name="P6"/>
      <text:p text:style-name="P7">Selected Experience<text:toc-mark text:string-value="Project Experience " text:outline-level="3"/></text:p>
      <text:p text:style-name="P8"/>
      <text:p text:style-name="P9"><text:tab/><text:span text:style-name="T1">Principal Software Engineer at Walmart </text:span>(<text:span text:style-name="T2">2021-present)</text:span></text:p>
      <text:p text:style-name="P10">Working on Walmart transaction team, leading iOS checkout development. Responsible for code quality, mentoring, analytics, coordination with other teams.</text:p>
      <text:p text:style-name="P9"><text:tab/><text:span text:style-name="T1">McGraw Hill Education Sharpen App </text:span>(<text:span text:style-name="T2">2022-</text:span><text:span text:style-name="T3">2023</text:span><text:span text:style-name="T2">)</text:span></text:p>
      <text:p text:style-name="P11">Work<text:span text:style-name="T4">ed</text:span> with <text:span text:style-name="T1">McGraw Hill team on iOS Sharpen App development and as a data engineer with overall analytics pipeline from mobile apps and website.</text:span></text:p>
      <text:p text:style-name="P9"><text:tab/><text:span text:style-name="T2">Walmart App </text:span>(<text:span text:style-name="T2">2020-2021)</text:span></text:p>
      <text:p text:style-name="P11">Work<text:span text:style-name="T1">ed </text:span>with Walmart <text:span text:style-name="T1">Global Tech</text:span>, tech lead for checkout team on new iOS eCommerce app built on a uni-directional, plug-in style architecture using Combine.</text:p>
      <text:p text:style-name="P9"><text:tab/><text:span text:style-name="T5">Sam's Club </text:span>App (201<text:span text:style-name="T5">7</text:span>-<text:span text:style-name="T6">2020</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2">Work<text:span text:style-name="T7">ed</text:span> with <text:span text:style-name="T5">Sam's Club </text:span>team on iOS <text:span text:style-name="T6">eCommerce app</text:span>. <text:span text:style-name="T6">Converted app to use </text:span>RxSwift<text:span text:style-name="T5">, prepared it to move to Combine frameworks.</text:span></text:p>
      <text:p text:style-name="P13"><text:tab/>ASDA Universal App (2014-<text:span text:style-name="T5">2017</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4">Work<text:span text:style-name="T8">ed</text:span> with Walmart Labs team on iOS app for their UK subsidiary, ASDA. Convert<text:span text:style-name="T7">ed </text:span>app to <text:span text:style-name="T7">use </text:span>RxSwift: rewr<text:span text:style-name="T7">ote</text:span> legacy components and <text:span text:style-name="T7">wrote </text:span>new modules.</text:p>
      <text:p text:style-name="P15"/>
      <text:p text:style-name="P16"><text:tab/><text:span text:style-name="T7">Custom iOS apps development and maintenance for clients </text:span>(<text:span text:style-name="T5">iOS</text:span>, <text:span text:style-name="T5">2010-2019</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6"><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7"><text:span text:style-name="T9"><text:tab/></text:span><text:span text:style-name="T10">DoD and DARPA projects researcher and developer (2003-2007) </text:span><text:toc-mark text:string-value="System Analysis for a multi-tier, DII-COE system (2001) " text:outline-level="4"/></text:p>
      <text:p text:style-name="P18"><text:span text:style-name="T9"><text:tab/></text:span><text:span text:style-name="T10">Adjunct Instructor for various university computer courses (1982-2006) </text:span></text:p>
      <text:p text:style-name="P19">Development Experience <text:toc-mark text:string-value="Design experience " text:outline-level="3"/></text:p>
      <text:p text:style-name="P20">iPhone, iPad, and iOS development<text:tab/><text:tab/><text:tab/><text:tab/><text:span text:style-name="T5">1</text:span><text:span text:style-name="T11">5</text:span>+ years</text:p>
      <text:p text:style-name="P20"><text:span text:style-name="T6">Reactive architecture design and</text:span> development<text:tab/><text:tab/><text:tab/><text:span text:style-name="T11">10</text:span>+ years</text:p>
      <text:p text:style-name="P20">Other mobile systems design and development<text:tab/><text:tab/><text:tab/><text:span text:style-name="T1">10</text:span>+ years</text:p>
      <text:p text:style-name="P20">Java Desktop and Enterprise design and development<text:tab/><text:tab/>15+ years</text:p>
      <text:p text:style-name="P21">Multi-tier, distributed systems design and development<text:tab/><text:tab/>30+ years</text:p>
      <text:p text:style-name="P21">Overall professional development experience<text:tab/><text:tab/><text:tab/><text:span text:style-name="T5">40+</text:span> years</text:p>
      <text:p text:style-name="P22"/>
      <text:p text:style-name="P23">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24">Various internal training sessions (2021-present) (Walmart)</text:p>
      <text:p text:style-name="P25"><text:span text:style-name="T11">V</text:span>arious conference sessions 2011-2014 (CocoaConf, 360iDev, D2Cincinnati)</text:p>
      <text:p text:style-name="P21">Regular presenter at CocoaHeads (Columbus, Cincinnati, Cleveland, Indianapolis)</text:p>
      <text:p text:style-name="P21">Co-organizer of Cincinnati CocoaDev</text:p>
      <text:p text:style-name="P21">Adjunct instructor, programming courses (Cedarville 1982-2006)</text:p>
      <text:p text:style-name="P22"/>
      <text:p text:style-name="P23">Work Experience <text:toc-mark text:string-value="Work Experience " text:outline-level="3"/><text:toc-mark text:string-value="Work Experience " text:outline-level="3"/></text:p>
      <text:p text:style-name="P26">Walmart<text:tab/><text:tab/>2021-present<text:tab/>Principal software engineer</text:p>
      <text:p text:style-name="P27"><text:span text:style-name="T11">I</text:span>ndependent<text:tab/><text:tab/>1998-present<text:tab/>Independent software craftsman</text:p>
      <text:p text:style-name="P28">Synergy, Inc.<text:tab/><text:tab/>1996‑1998<text:tab/>Software design and development</text:p>
      <text:p text:style-name="P28">Rotman &amp; Sjoquist<text:tab/>1988-1996<text:tab/>Extensive consulting and programming in a partnership</text:p>
      <text:p text:style-name="P28">Cedarville College<text:tab/>1982‑1996<text:tab/>Various roles ending with Asst. Dir. of Computer Services</text:p>
      <text:p text:style-name="P28"><text:tab/><text:tab/><text:tab/><text:tab/><text:tab/>Adjunct Instructor, computer language courses</text:p>
      <text:p text:style-name="P28">Independent<text:tab/><text:tab/>1980-1988<text:tab/>Custom software development for various businesses.</text:p>
      <text:p text:style-name="P29"/>
      <text:p text:style-name="P23">Education <text:toc-mark text:string-value="Education " text:outline-level="3"/></text:p>
      <text:p text:style-name="P30">B.A. Business Administration, Cedarville College, June 1982</text:p>
      <text:p text:style-name="P30">Computer Information Systems 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loext:opacity="0%"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master-page-name="Standard">
      <style:paragraph-properties style:line-height-at-least="0.2083in" style:page-number="auto" style:writing-mode="lr-tb">
        <style:tab-stops>
          <style:tab-stop style:position="6.5in" style:type="right"/>
        </style:tab-stops>
      </style:paragraph-properties>
    </style:style>
    <style:style style:name="MP2" style:family="paragraph" style:parent-style-name="Standard">
      <style:paragraph-properties style:line-height-at-least="0.2083in" fo:text-align="end" style:justify-single-word="false" style:writing-mode="lr-tb"/>
      <style:text-properties fo:font-size="12pt" officeooo:rsid="00159688" officeooo:paragraph-rsid="00159688"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style style:name="MT3" style:family="text">
      <style:text-properties officeooo:rsid="00223347"/>
    </style:style>
    <style:style style:name="MT4" style:family="text">
      <style:text-properties officeooo:rsid="0021d5a0"/>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ouglas W. Sjoquist<text:tab/></text:span><text:a xlink:type="simple" xlink:href="mailto:dwSjoquist@sunetos.com" text:style-name="Internet_20_link" text:visited-style-name="Visited_20_Internet_20_Link"><text:span text:style-name="Internet_20_link"><text:span text:style-name="MT2">dwsjoquist@sunetos.com</text:span></text:span></text:a></text:p>
        <text:p text:style-name="MP2"><text:span text:style-name="MT3">October</text:span> 202<text:span text:style-name="MT4">5</text:span></text:p>
      </style:header>
      <style:footer>
        <text:p text:style-name="MP3">Page <text:page-number text:select-page="current">2</text:page-number><text:s/>of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MacOSX_AARCH64 LibreOffice_project/33e196637044ead23f5c3226cde09b47731f7e27</meta:generator>
    <dc:title>Douglas W</dc:title>
    <meta:initial-creator>Douglas W Sjoquist</meta:initial-creator>
    <meta:creation-date>2006-05-12T21:25:00</meta:creation-date>
    <dc:date>2025-10-22T18:05:34.087329000</dc:date>
    <dc:language>en-US</dc:language>
    <meta:editing-cycles>98</meta:editing-cycles>
    <meta:editing-duration>PT14H11M42S</meta:editing-duration>
    <meta:print-date>2025-10-22T18:04:54.199029000</meta:print-date>
    <meta:printed-by>PDF files</meta:printed-by>
    <meta:document-statistic meta:table-count="0" meta:image-count="0" meta:object-count="0" meta:page-count="2" meta:paragraph-count="46" meta:word-count="414" meta:character-count="3155" meta:non-whitespace-character-count="2752"/>
    <meta:user-defined meta:name="Info 1"/>
    <meta:user-defined meta:name="Info 2"/>
    <meta:user-defined meta:name="Info 3"/>
    <meta:user-defined meta:name="Info 4"/>
  </office:meta>
</office:document-meta>
</file>