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0"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1" style:family="paragraph" style:parent-style-name="_32_Definitions">
      <style:paragraph-properties fo:text-align="start" style:justify-single-word="false"/>
    </style:style>
    <style:style style:name="P12" style:family="paragraph" style:parent-style-name="_32_Definitions">
      <style:paragraph-properties fo:line-height="100%" fo:text-align="start" style:justify-single-word="false"/>
    </style:style>
    <style:style style:name="P1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6"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1">Experienced software craftsman with a strong background in iOS and distributed, asynchronous system design and development.</text:p>
      <text:p text:style-name="P5"/>
      <text:p text:style-name="P11">Rapid problem analysis with the ability to work with clients and end users in developing and refining requirements. Good grasp of how each piece fits in with client's overall goals and needs and help them balance technical excellence with business objectives. Experienced and comfortable with agile development methods. Ability to learn and integrate new techniques, tools, and skills quickly.<text:span text:style-name="T3"> </text:span>Able to mentor and assist development team members in developing their skills.</text:p>
      <text:p text:style-name="P13"/>
      <text:p text:style-name="P3">Selected Experience<text:toc-mark text:string-value="Project Experience " text:outline-level="3"/></text:p>
      <text:p text:style-name="P5"/>
      <text:p text:style-name="P7"><text:tab/>ASDA Universal App (2014-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Working with Walmart Labs team on iOS app for their UK subsidiary, ASDA. Converting the internal architecture of the app to be reactive using RxSwift, rewriting legacy components in Swift and RxSwift, and writing new modules using RxSwift.</text:p>
      <text:p text:style-name="P8"/>
      <text:p text:style-name="P7"><text:tab/>Home Power Generator Control and Status App (2016-present)</text:p>
      <text:p text:style-name="P11">Developing consumer app to control client's gas-powered generators via Bluetooth.</text:p>
      <text:p text:style-name="P8"/>
      <text:p text:style-name="P7"><text:tab/>Custom Universal App for Physical Therapists (2016-present)</text:p>
      <text:p text:style-name="P11">Developing new medical app for therapists to develop individual treatment and exercises plans for physical rehabilitation patients. <text:s/>Synchronizing data between client, backend API, and a distributed database architecture based on Realm.</text:p>
      <text:p text:style-name="P8"/>
      <text:p text:style-name="P7"><text:tab/>Client App Maintenance (2010-present)</text:p>
      <text:p text:style-name="P11">On-going work with various clients to maintain and update existing apps.</text:p>
      <text:p text:style-name="P8"/>
      <text:p text:style-name="P7"><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teractive sales tool for a client's very large construction project.</text:p>
      <text:p text:style-name="P8"/>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OS app and backend for a client's employee training business. It manages <text:soft-page-break/>videos, assessments, and tracking and is built on Microsoft’s Azure cloud services.</text:p>
      <text:p text:style-name="P5"/>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pp for a client so their customers can track medically significant events which they can share with medical provider to receive advice and therapy alternatives.</text:p>
      <text:p text:style-name="P5"/>
      <text:p text:style-name="P7"><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data synchronization for a suite of medical apps. Helped client design backend API for synchronization, assisted with data security and system architecture.</text:p>
      <text:p text:style-name="P5"/>
      <text:p text:style-name="P7"><text:tab/>EAA AirVenture, SUN 'n FUN, WAI Conference apps (2011-2013)</text:p>
      <text:p text:style-name="P11">Developed conference app framework to be configurable without requiring coding changes, changed the style of the app to use slide out menus and custom submodules to handle different content types. </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 framework to dynamically generate data entry forms based on templates downloaded from a server, allow user to enter data and submit it back to the server.</text:p>
      <text:p text:style-name="P5"/>
      <text:p text:style-name="P8"/>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text:span text:style-name="T2"><text:tab/></text:span><text:span text:style-name="T3">DoD and DARPA projects researcher and developer (2003-2007) </text:span><text:toc-mark text:string-value="System Analysis for a multi-tier, DII-COE system (2001) " text:outline-level="4"/><text:span text:style-name="T3"/></text:p>
      <text:p text:style-name="P9"><text:span text:style-name="T2"><text:tab/></text:span><text:span text:style-name="T3">Adjunct Instructor for various university computer courses (1982-2006) </text:span></text:p>
      <text:p text:style-name="P14">Development Experience <text:toc-mark text:string-value="Design experience " text:outline-level="3"/></text:p>
      <text:p text:style-name="P15">iPhone, iPad, and iOS development<text:tab/><text:tab/><text:tab/><text:tab/>8+ years</text:p>
      <text:p text:style-name="P15">Other mobile systems design and development<text:tab/><text:tab/><text:tab/>8+ years</text:p>
      <text:p text:style-name="P15">Java Desktop and Enterprise design and development<text:tab/><text:tab/>15+ years</text:p>
      <text:p text:style-name="P15">Multi-tier, distributed systems design and development<text:tab/><text:tab/>30+ years</text:p>
      <text:p text:style-name="P15">Overall professional development experience<text:tab/><text:tab/><text:tab/>35+ years</text:p>
      <text:p text:style-name="P16"/>
      <text:p text:style-name="P4">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15">Various conference sessions 2011-2014 (CocoaConf, 360iDev, D2Cincinnati)</text:p>
      <text:p text:style-name="P15">Regular presenter at CocoaHeads (Columbus, Cincinnati, Cleveland, Indianapolis)</text:p>
      <text:p text:style-name="P15">Co-organizer of Cincinnati CocoaDev</text:p>
      <text:p text:style-name="P15">Adjunct instructor, programming courses (Cedarville 1982-2006)</text:p>
      <text:p text:style-name="P16"/>
      <text:p text:style-name="P4">Work Experience <text:toc-mark text:string-value="Work Experience " text:outline-level="3"/><text:toc-mark text:string-value="Work Experience " text:outline-level="3"/></text:p>
      <text:p text:style-name="P17">Independent<text:tab/><text:tab/>1998-present<text:tab/>Independent software craftsman</text:p>
      <text:p text:style-name="P10">Synergy, Inc.<text:tab/><text:tab/>1996‑1998<text:tab/>Software design and development</text:p>
      <text:p text:style-name="P10">Rotman &amp; Sjoquist<text:tab/>1988-1996<text:tab/>Extensive consulting and programming in a partnership</text:p>
      <text:p text:style-name="P10">Cedarville College<text:tab/>1982‑1996<text:tab/>Various roles ending with Asst. Dir. of Computer Services</text:p>
      <text:p text:style-name="P10"><text:tab/><text:tab/><text:tab/><text:tab/><text:tab/>Adjunct Instructor, computer language courses</text:p>
      <text:p text:style-name="P10">Independent<text:tab/><text:tab/>1980-1988<text:tab/>Custom software development for various businesses.</text:p>
      <text:p text:style-name="P2"/>
      <text:p text:style-name="P4">Education <text:toc-mark text:string-value="Education " text:outline-level="3"/></text:p>
      <text:p text:style-name="P12">B.A. Business Administration, Cedarville College, June 1982</text:p>
      <text:p text:style-name="P12">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April 2017</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12$Unix OpenOffice.org_project/</meta:generator>
    <dc:title>Douglas W</dc:title>
    <meta:initial-creator>Douglas W Sjoquist</meta:initial-creator>
    <meta:creation-date>2006-05-12T21:25:00</meta:creation-date>
    <dc:date>2017-04-03T14:20:34</dc:date>
    <dc:language>en-US</dc:language>
    <meta:editing-cycles>82</meta:editing-cycles>
    <meta:editing-duration>PT11H10M06S</meta:editing-duration>
    <meta:print-date>2011-11-03T17:08:36</meta:print-date>
    <meta:document-statistic meta:table-count="0" meta:image-count="0" meta:object-count="0" meta:page-count="3" meta:paragraph-count="57" meta:word-count="786" meta:character-count="4799"/>
    <meta:user-defined meta:name="Info 1"/>
    <meta:user-defined meta:name="Info 2"/>
    <meta:user-defined meta:name="Info 3"/>
    <meta:user-defined meta:name="Info 4"/>
  </office:meta>
</office:document-meta>
</file>