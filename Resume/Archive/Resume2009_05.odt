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8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_32_Definitions">
      <style:paragraph-properties fo:text-align="start" style:justify-single-word="false"/>
    </style:style>
    <style:style style:name="P12" style:family="paragraph" style:parent-style-name="_32_Definitions">
      <style:paragraph-properties fo:line-height="100%" fo:text-align="start" style:justify-single-word="false"/>
    </style:style>
    <style:style style:name="P13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14" style:family="paragraph" style:parent-style-name="Standard" style:master-page-name="Standard">
      <style:paragraph-properties style:page-number="auto">
        <style:tab-stops>
          <style:tab-stop style:position="6.5in" style:type="right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1"><text:span text:style-name="T1">Sunetos, Inc.<text:tab/></text:span><text:span text:style-name="T2">www.sunetos.com</text:span></text:p>
      <text:p text:style-name="P3">May 2009</text:p>
      <text:p text:style-name="P2"/>
      <text:p text:style-name="P5">Summary <text:toc-mark text:string-value="Summary " text:outline-level="3"/></text:p>
      <text:p text:style-name="P11">Experienced system architect with excellent communication, analysis, design and development skills. Strong background with multi-tier, distributed system design and development on servers, application clients, and web clients. <text:s/>Extensive experience with tools and frameworks such as client and server side Java, Delphi, Google Web Toolkit, and JBoss. </text:p>
      <text:p text:style-name="P11"/>
      <text:p text:style-name="P11">Rapid problem analysis with the ability to work with users in developing and refining requirements. Good grasp of how each piece fits in with organization's overall goals and needs. <text:s/>Experienced and comfortable with agile development methods. <text:s/>Ability to learn and integrate new development techniques, tools, and skills quickly, soon becoming productive in the new environment.</text:p>
      <text:p text:style-name="P2"/>
      <text:p text:style-name="P5">Project Experience<text:toc-mark text:string-value="Project Experience " text:outline-level="3"/></text:p>
      <text:p text:style-name="P7"><text:span text:style-name="T2"><text:tab/></text:span><text:span text:style-name="T3">Recycling and manufacturing tracking system (2006-2009)</text:span><text:toc-mark text:string-value="System Analysis for a multi-tier, DII-COE system (2001) " text:outline-level="4"/><text:span text:style-name="T3"/><text:toc-mark text:string-value="System Analysis for a multi-tier, DII-COE system (2001) " text:outline-level="4"/><text:span text:style-name="T3"/></text:p>
      <text:p text:style-name="P11">Primary architect and lead developer for a system to support the recycling business for a mining client. <text:s text:c="2"/>The system was written in Java using a mixture of open source and proprietary components, with a mixed database environment of IBM DB2 and Apache Derby.</text:p>
      <text:p text:style-name="P7"><text:span text:style-name="T2"><text:tab/></text:span><text:span text:style-name="T3">Update existing Java Swing application <text:s/>(2009) </text:span><text:toc-mark text:string-value="System Analysis for a multi-tier, DII-COE system (2001) " text:outline-level="4"/><text:span text:style-name="T3"/></text:p>
      <text:p text:style-name="P11">Modifying an existing Java Swing application to support undo and redo. <text:s/>The existing application is a visual designer tool for US Air Force end users to build screens for their data warehouse. <text:s/>The modifications will allow them complete undo and redo functionality for their work.</text:p>
      <text:p text:style-name="P7"><text:span text:style-name="T2"><text:tab/></text:span><text:span text:style-name="T3">Java library development (2003-2006) </text:span><text:toc-mark text:string-value="System Analysis for a multi-tier, DII-COE system (2001) " text:outline-level="4"/><text:span text:style-name="T3"/></text:p>
      <text:p text:style-name="P11">Developed various custom libraries to meet client specifications such as a role-based security library for swing components that controls various component properties (visible, enabled, editable) dynamically based on a user's authenticated credentials.</text:p>
      <text:p text:style-name="P7"><text:span text:style-name="T2"><text:tab/></text:span><text:span text:style-name="T3">Prototype DoD Humanitarian Aid and Disaster Relief planning system (2006-2007) </text:span><text:toc-mark text:string-value="System Analysis for a multi-tier, DII-COE system (2001) " text:outline-level="4"/><text:span text:style-name="T3"/></text:p>
      <text:p text:style-name="P11">Worked as researcher and developer on a prototype Humanitarian Aid and Disaster Relief planning system for the DoD. <text:s/>Developed module that allowed web users to collaboratively build, approve, and publish initial planning documents and briefings. <text:s/><text:soft-page-break/>Researched use of semantic web concepts (ontologies, OWL, Protege') in support of the process.</text:p>
      <text:p text:style-name="P7"><text:span text:style-name="T2"><text:tab/></text:span><text:span text:style-name="T3">Job posting and application web applications (2005-2006) </text:span><text:toc-mark text:string-value="System Analysis for a multi-tier, DII-COE system (2001) " text:outline-level="4"/><text:span text:style-name="T3"/><text:toc-mark text:string-value="System Analysis for a multi-tier, DII-COE system (2001) " text:outline-level="4"/><text:span text:style-name="T3"/></text:p>
      <text:p text:style-name="P11">Developed job posting and job application web applications to allow HR department to quickly build new listings from existing postings or templates. <text:s/>It allows current employees to apply over the corporate intranet, and others to apply over a secure internet application.</text:p>
      <text:p text:style-name="P8"><text:tab/>Software agent research prototype (2004-2005) <text:toc-mark text:string-value="System Analysis for a multi-tier, DII-COE system (2001) " text:outline-level="4"/></text:p>
      <text:p text:style-name="P11">Designed and developed java subsystems for a proof of concept distributed agent system: rule engine subsystem, end-user rule builder GUI, tracking subsystem, other subsystem APIs, and system utilities. <text:s/>Mentored team members in J2EE design, Java patterns, and refactoring. <text:s/>Worked with client representatives in developing roadmap for overall project.</text:p>
      <text:p text:style-name="P7"><text:span text:style-name="T2"><text:tab/></text:span><text:span text:style-name="T3">Java Servlet/Applet timecard (2003) </text:span><text:toc-mark text:string-value="System Analysis for a multi-tier, DII-COE system (2001) " text:outline-level="4"/><text:span text:style-name="T3"/></text:p>
      <text:p text:style-name="P11">Developed time card applet interface to an existing small business accounting system including employee entry and signing of hours and supervisor approval and printing.</text:p>
      <text:p text:style-name="P7"><text:span text:style-name="T2"><text:tab/></text:span><text:span text:style-name="T3">Configurable real time engine data display (2003)</text:span></text:p>
      <text:p text:style-name="P11">Developed prototype system to provide a user configurable display system for an integrated bridge system for Navy small boats. <text:s/>The system monitors and displays real time data feeds from multiple engines in text or graphics mode.</text:p>
      <text:p text:style-name="P7"><text:span text:style-name="T2"><text:tab/></text:span><text:span text:style-name="T3">Java and J2EE mentoring and training (2002-2006)</text:span></text:p>
      <text:p text:style-name="P9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1"><text:span text:style-name="T1">Sunetos, Inc.<text:tab/></text:span><text:span text:style-name="T2">www.sunetos.com</text:span></text:p>
      <text:p text:style-name="P3">May 2009</text:p>
      <text:p text:style-name="P2"/>
      <text:p text:style-name="P6">Design experience <text:toc-mark text:string-value="Design experience " text:outline-level="3"/></text:p>
      <text:p text:style-name="P13">J2EE, Java 2 Enterprise Edition design and development<text:tab/><text:tab/>10 years</text:p>
      <text:p text:style-name="P13">Web Services design and development<text:tab/><text:tab/><text:tab/><text:tab/>4 years</text:p>
      <text:p text:style-name="P13">Multi-tier, distributed systems design and development<text:tab/><text:tab/>14 years</text:p>
      <text:p text:style-name="P13">Software and database analysis, design, and development<text:tab/><text:tab/>29 years</text:p>
      <text:p text:style-name="P13">Handheld systems design and development<text:tab/><text:tab/><text:tab/>2 years</text:p>
      <text:p text:style-name="P13">Peer to peer (P2P) design and development<text:tab/><text:tab/><text:tab/>6 years</text:p>
      <text:p text:style-name="P13">CORBA, Common Object Request Broker Architecture<text:tab/><text:tab/>2 years</text:p>
      <text:p text:style-name="P13">Object oriented design and development<text:tab/><text:tab/><text:tab/><text:tab/>20 years</text:p>
      <text:p text:style-name="P4"/>
      <text:p text:style-name="P6">Languages and Tools experience <text:toc-mark text:string-value="Languages and Tools experience " text:outline-level="3"/></text:p>
      <text:p text:style-name="P13">Java<text:tab/><text:tab/><text:tab/><text:tab/><text:tab/><text:tab/><text:tab/><text:tab/><text:tab/>12 years</text:p>
      <text:p text:style-name="P13">J2EE (IBM WebSphere, BEA WebLogic, Tomcat, JBoss)<text:tab/>7 years</text:p>
      <text:p text:style-name="P13">TIBCO (BusinessWorks/Rendezvous)<text:tab/><text:tab/><text:tab/><text:tab/>1+ years</text:p>
      <text:p text:style-name="P13">Borland/Delphi<text:tab/><text:tab/><text:tab/><text:tab/><text:tab/><text:tab/><text:tab/>11 years</text:p>
      <text:p text:style-name="P13">Palm OS/Java 2 Micro Edition (J2ME)<text:tab/><text:tab/><text:tab/><text:tab/>1 year</text:p>
      <text:p text:style-name="P13">PocketPC/WinCE<text:tab/><text:tab/><text:tab/><text:tab/><text:tab/><text:tab/><text:tab/>1 year</text:p>
      <text:p text:style-name="P13">SQL (Oracle, Microsoft, DB2)<text:tab/><text:tab/><text:tab/><text:tab/><text:tab/>13 years</text:p>
      <text:p text:style-name="P13">Others (CORBA, Pick/UniData, C/C++, FORTRAN, COBOL)</text:p>
      <text:p text:style-name="P4"/>
      <text:p text:style-name="P6">Work Experience <text:toc-mark text:string-value="Work Experience " text:outline-level="3"/></text:p>
      <text:p text:style-name="P10">Sunetos, Inc.<text:tab/><text:tab/>1998-present<text:tab/>Multi-tier, distributed system architect and developer</text:p>
      <text:p text:style-name="P10">Synergy, Inc.<text:tab/><text:tab/>1996‑1998<text:tab/>Software design and development</text:p>
      <text:p text:style-name="P10">Rotman &amp; Sjoquist<text:tab/>1988-1996<text:tab/>Extensive consulting and programming in a partnership</text:p>
      <text:p text:style-name="P10">Cedarville College<text:tab/>1982‑1996<text:tab/>Various roles ending with Asst. Dir. of Computer Services</text:p>
      <text:p text:style-name="P10">Cedarville College<text:tab/>1985‑1994<text:tab/>Adjunct Instructor, computer language courses</text:p>
      <text:p text:style-name="P10">Custom development<text:tab/>1980-1988<text:tab/>Custom software development for various businesses.</text:p>
      <text:p text:style-name="P4"/>
      <text:p text:style-name="P6">Education <text:toc-mark text:string-value="Education " text:outline-level="3"/></text:p>
      <text:p text:style-name="P12">B.A. Business Administration, Cedarville College, June 1982, GPA 3.5/4.0</text:p>
      <text:p text:style-name="P12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dc:title>Douglas W</dc:title>
    <meta:initial-creator>Douglas W Sjoquist</meta:initial-creator>
    <meta:creation-date>2006-05-12T21:25:00</meta:creation-date>
    <dc:date>2009-05-28T12:56:08</dc:date>
    <dc:language>en-US</dc:language>
    <meta:editing-cycles>10</meta:editing-cycles>
    <meta:editing-duration>PT01H02M29S</meta:editing-duration>
    <meta:document-statistic meta:table-count="0" meta:image-count="0" meta:object-count="0" meta:page-count="3" meta:paragraph-count="55" meta:word-count="696" meta:character-count="4946"/>
    <meta:user-defined meta:name="Info 1"/>
    <meta:user-defined meta:name="Info 2"/>
    <meta:user-defined meta:name="Info 3"/>
    <meta:user-defined meta:name="Info 4"/>
  </office:meta>
</office:document-meta>
</file>