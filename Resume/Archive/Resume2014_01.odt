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master-page-name="Standard">
      <style:paragraph-properties style:page-number="auto">
        <style:tab-stops>
          <style:tab-stop style:position="6.5in" style:type="right"/>
        </style:tab-stops>
      </style:paragraph-properties>
    </style:style>
    <style:style style:name="P18"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19" style:family="paragraph" style:parent-style-name="Standard">
      <style:paragraph-properties fo:line-height="0.1in"/>
      <style:text-properties fo:font-size="12pt" fo:font-weight="bold" style:font-size-asian="12pt" style:font-weight-asian="bold" style:font-size-complex="12pt" style:font-weight-complex="bold"/>
    </style:style>
    <style:style style:name="P20"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margin-left="1.5in" fo:margin-right="0in" fo:text-indent="-1.5in" style:auto-text-indent="false" fo:break-before="pag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2" style:family="paragraph" style:parent-style-name="_32_Definitions">
      <style:paragraph-properties fo:text-align="start"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2"/>
      <text:p text:style-name="P3">Selected Project and Speaking Experience<text:toc-mark text:string-value="Project Experience " text:outline-level="3"/></text:p>
      <text:p text:style-name="P5"/>
      <text:p text:style-name="P7"><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OS app, backend services, and employee management web app for a client's employee training services they provide to other businesses. The iOS app manages training videos, handbooks, assessments, and tracking for the end customer's employees. The backend is built on top of Microsoft’s Azure cloud services.</text:p>
      <text:p text:style-name="P5"/>
      <text:p text:style-name="P7"><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pp for a pharmaceutical client for their customers to document and track medically significant events related to their medical condition. It allows customers to interact with the client's medical staff to receive advice and therapy alternatives.</text:p>
      <text:p text:style-name="P5"/>
      <text:p text:style-name="P7"><text:tab/>MedSnap ID – Medical app for prescription and drug identification (2012-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data synchronization and database component for a suite of apps in the medical field. Helped client design backend API for synchronization, assisted with data security and system architecture.</text:p>
      <text:p text:style-name="P5"/>
      <text:p text:style-name="P7"><text:tab/>Spoke at CocoaConf (DC, Dallas, Columbus 2013)</text:p>
      <text:p text:style-name="P10">Gave various technical and project management sessions for developers.</text:p>
      <text:p text:style-name="P5"/>
      <text:p text:style-name="P21"><text:tab/>EAA AirVenture Conference app (2011-2013)</text:p>
      <text:p text:style-name="P7"><text:tab/>SUN 'n FUN Conference app (2011-2013)</text:p>
      <text:p text:style-name="P7"><text:tab/>WAI Women in Aviation Conference app (2011-2013)</text:p>
      <text:p text:style-name="P10">Developed conference app framework to be configurable without requiring coding changes, changed the style of the app to use slide out menus and custom submodules to handle different content types. <text:s/>App features include customizable personal schedule, an integrated PDF reader, multiple schedules, exhibitors, maps, and information pages, and automatic network based updates of data.</text:p>
      <text:p text:style-name="P5"/>
      <text:p text:style-name="P7"><text:tab/>iLA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nitial version of client's iPad app for organizing notes, links, and ideas and then sharing them automatically with peers.</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8"><text:span text:style-name="T2"><text:tab/></text:span><text:span text:style-name="T3">DoD and DARPA projects researcher and developer (2003-2007) </text:span><text:toc-mark text:string-value="System Analysis for a multi-tier, DII-COE system (2001) " text:outline-level="4"/></text:p>
      <text:p text:style-name="P8"><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3">iPhone, iPad, and iOS development<text:tab/><text:tab/><text:tab/><text:tab/>4+ years</text:p>
      <text:p text:style-name="P13">Other mobile systems design and development<text:tab/><text:tab/><text:tab/>5+ years</text:p>
      <text:p text:style-name="P13">Java Desktop and Enterprise design and development<text:tab/><text:tab/>15+ years</text:p>
      <text:p text:style-name="P13">Multi-tier, distributed systems design and development<text:tab/><text:tab/>25+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text:p>
      <text:p text:style-name="P13">Languages: Objective-C, Java, C/C++</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January 2014</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2013.2$Unix OpenOffice.org_project/</meta:generator>
    <dc:title>Douglas W</dc:title>
    <meta:initial-creator>Douglas W Sjoquist</meta:initial-creator>
    <meta:creation-date>2006-05-12T21:25:00</meta:creation-date>
    <dc:date>2014-01-14T14:36:41</dc:date>
    <dc:language>en-US</dc:language>
    <meta:editing-cycles>71</meta:editing-cycles>
    <meta:editing-duration>PT09H06M13S</meta:editing-duration>
    <meta:print-date>2011-11-03T17:08:36</meta:print-date>
    <meta:document-statistic meta:table-count="0" meta:image-count="0" meta:object-count="0" meta:page-count="3" meta:paragraph-count="49" meta:word-count="664" meta:character-count="4191"/>
    <meta:user-defined meta:name="Info 1"/>
    <meta:user-defined meta:name="Info 2"/>
    <meta:user-defined meta:name="Info 3"/>
    <meta:user-defined meta:name="Info 4"/>
  </office:meta>
</office:document-meta>
</file>