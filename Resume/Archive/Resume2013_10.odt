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6"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1">Experienced software craftsman with a strong background in iOS and distributed system design and development.</text:p>
      <text:p text:style-name="P5"/>
      <text:p text:style-name="P11">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3"/>
      <text:p text:style-name="P3">Selected Project and Speaking Experience<text:toc-mark text:string-value="Project Experience " text:outline-level="3"/></text:p>
      <text:p text:style-name="P5"/>
      <text:p text:style-name="P7"><text:tab/>Employee manual app with training videos and quizzes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pp for a client for their employees to review training videos, take quizzes on the material, and report results back to the office.</text:p>
      <text:p text:style-name="P5"/>
      <text:p text:style-name="P7"><text:tab/>MyFactor – Personal medical incident and injury tracking app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ing app for a pharmaceutical client for their customers to document and track medically significant events related to their medical condition. It allows customers to interact with the client's medical staff to receive advice and therapy alternatives.</text:p>
      <text:p text:style-name="P5"/>
      <text:p text:style-name="P7"><text:tab/>MedSnap ID – Medical app for prescription and drug identification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data synchronization and database component for a suite of apps in the medical field. Helped client design backend API for synchronization, assisted with data security and system architecture.</text:p>
      <text:p text:style-name="P5"/>
      <text:p text:style-name="P7"><text:tab/>Spoke at CocoaConf (DC, Dallas, Columbus 2013)</text:p>
      <text:p text:style-name="P11">Gave various technical and project management sessions for developers.</text:p>
      <text:p text:style-name="P5"/>
      <text:p text:style-name="P7"/>
      <text:p text:style-name="P9"><text:tab/>SUN 'n FUN Conference app (2013)</text:p>
      <text:p text:style-name="P7"><text:tab/>WAI Women in Aviation Conference app (2013)</text:p>
      <text:p text:style-name="P11">Developed conference app framework to be configurable without requiring coding changes, changed the style of the app to use slide out menus and custom submodules to handle different content types. <text:s/>App features include customizable personal schedule, an integrated PDF reader, multiple schedules, exhibitors, maps, and information pages, and automatic network based updates of data.</text:p>
      <text:p text:style-name="P5"/>
      <text:p text:style-name="P7"/>
      <text:p text:style-name="P7"><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SUN 'n FUN Conference app (2012)</text:p>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 framework to dynamically generate data entry forms based on templates downloaded from a server, allow user to enter data and submit it back to the server.</text:p>
      <text:p text:style-name="P5"/>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8"><text:span text:style-name="T2"><text:tab/></text:span><text:span text:style-name="T3">Adjunct Instructor for various university computer courses (1982-2006) </text:span></text:p>
      <text:p text:style-name="P16">Development experience <text:toc-mark text:string-value="Design experience " text:outline-level="3"/></text:p>
      <text:p text:style-name="P14">iPhone, iPad, and iOS development<text:tab/><text:tab/><text:tab/><text:tab/>4+ years</text:p>
      <text:p text:style-name="P14">Other mobile systems design and development<text:tab/><text:tab/><text:tab/>5+ years</text:p>
      <text:p text:style-name="P14">Java Desktop and Enterprise design and development<text:tab/><text:tab/>15+ years</text:p>
      <text:p text:style-name="P14">Multi-tier, distributed systems design and development<text:tab/><text:tab/>25+ years</text:p>
      <text:p text:style-name="P14">Overall professional development experience<text:tab/><text:tab/><text:tab/>30+ years</text:p>
      <text:p text:style-name="P15"/>
      <text:p text:style-name="P4">Selected Language and Tool experience <text:toc-mark text:string-value="Languages and Tools experience " text:outline-level="3"/><text:toc-mark text:string-value="Languages and Tools experience " text:outline-level="3"/></text:p>
      <text:p text:style-name="P14">Mobile: iOS, Android</text:p>
      <text:p text:style-name="P14">Languages: Objective-C, Java, C/C++</text:p>
      <text:p text:style-name="P2"/>
      <text:p text:style-name="P4">Work Experience <text:toc-mark text:string-value="Work Experience " text:outline-level="3"/></text:p>
      <text:p text:style-name="P17">Independent<text:tab/><text:tab/>1998-present<text:tab/>Independent software craftsman</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text:tab/><text:tab/><text:tab/><text:tab/><text:tab/>Adjunct Instructor, computer language courses</text:p>
      <text:p text:style-name="P10">Independent<text:tab/><text:tab/>1980-1988<text:tab/>Custom software development for various businesses.</text:p>
      <text:p text:style-name="P2"/>
      <text:p text:style-name="P4">Education <text:toc-mark text:string-value="Education " text:outline-level="3"/></text:p>
      <text:p text:style-name="P12">B.A. Business Administration, Cedarville College, June 1982</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October 2013</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dc:title>Douglas W</dc:title>
    <meta:initial-creator>Douglas W Sjoquist</meta:initial-creator>
    <meta:creation-date>2006-05-12T21:25:00</meta:creation-date>
    <dc:date>2013-10-11T11:22:05</dc:date>
    <dc:language>en-US</dc:language>
    <meta:editing-cycles>70</meta:editing-cycles>
    <meta:editing-duration>PT08H36M01S</meta:editing-duration>
    <meta:print-date>2011-11-03T17:08:36</meta:print-date>
    <meta:document-statistic meta:table-count="0" meta:image-count="0" meta:object-count="0" meta:page-count="3" meta:paragraph-count="51" meta:word-count="679" meta:character-count="4121"/>
    <meta:user-defined meta:name="Info 1"/>
    <meta:user-defined meta:name="Info 2"/>
    <meta:user-defined meta:name="Info 3"/>
    <meta:user-defined meta:name="Info 4"/>
  </office:meta>
</office:document-meta>
</file>