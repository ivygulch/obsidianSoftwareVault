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9"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0" style:family="paragraph" style:parent-style-name="_32_Definitions">
      <style:paragraph-properties fo:text-align="start" style:justify-single-word="false"/>
    </style:style>
    <style:style style:name="P11" style:family="paragraph" style:parent-style-name="_32_Definitions">
      <style:paragraph-properties fo:line-height="100%" fo:text-align="start" style:justify-single-word="false"/>
    </style:style>
    <style:style style:name="P12"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5"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6"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7" style:family="paragraph" style:parent-style-name="Standard">
      <style:paragraph-properties fo:margin-left="0in" fo:margin-right="0in" fo:line-height="0.1in" fo:text-align="start" style:justify-single-word="false" fo:text-indent="0in" style:auto-text-indent="false"/>
      <style:text-properties fo:font-size="12pt" fo:font-weight="bold" style:font-size-asian="12pt" style:font-weight-asian="bold" style:font-size-complex="12pt" style:font-weight-complex="bold"/>
    </style:style>
    <style:style style:name="P18" style:family="paragraph" style:parent-style-name="Standard" style:master-page-name="Standard">
      <style:paragraph-properties style:page-number="auto">
        <style:tab-stops>
          <style:tab-stop style:position="6.5in" style:type="right"/>
        </style:tab-stops>
      </style:paragraph-properties>
    </style:style>
    <style:style style:name="P19"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20" style:family="paragraph" style:parent-style-name="Standard">
      <style:paragraph-properties fo:line-height="0.1in"/>
      <style:text-properties fo:font-size="12pt" fo:font-weight="bold" style:font-size-asian="12pt" style:font-weight-asian="bold" style:font-size-complex="12pt" style:font-weight-complex="bold"/>
    </style:style>
    <style:style style:name="P21"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22" style:family="paragraph" style:parent-style-name="_32_Definitions">
      <style:paragraph-properties fo:text-align="start" style:justify-single-word="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ummary <text:toc-mark text:string-value="Summary " text:outline-level="3"/></text:p>
      <text:p text:style-name="P5"/>
      <text:p text:style-name="P10">Experienced software craftsman with a strong background in iOS and distributed system design and development.</text:p>
      <text:p text:style-name="P5"/>
      <text:p text:style-name="P10">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techniques, tools, and skills quickly.<text:span text:style-name="T3"> </text:span>Able to mentor and assist development team members in developing their skills.</text:p>
      <text:p text:style-name="P12"/>
      <text:p text:style-name="P3">Selected Project and Speaking Experience<text:toc-mark text:string-value="Project Experience " text:outline-level="3"/></text:p>
      <text:p text:style-name="P5"/>
      <text:p text:style-name="P7"><text:tab/>Custom Sales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Pad app for enterprise deployment for a client with multiple custom, animated controls such as a circular menu and image maps with expandable hotspots.</text:p>
      <text:p text:style-name="P5"/>
      <text:p text:style-name="P7"><text:tab/>EAA AirVenture Conference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universal conference app for the Experimental Aircraft Association's annual fly-in convention similar to SUN 'n FUN and WAI apps.</text:p>
      <text:p text:style-name="P5"/>
      <text:p text:style-name="P7"><text:tab/>SUN 'n FUN Conference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universal conference app with same capabilities as the WAI app. <text:s/>Added ability for users to create a customized personal schedule and exhibitors to visit list. <text:s/>Added a custom, integrated PDF reader for larger documents.</text:p>
      <text:p text:style-name="P5"/>
      <text:p text:style-name="P7"><text:tab/>WAI Women in Aviation Conference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universal conference app with support for multiple schedules, exhibitors, maps, and information pages. Exhibitors are linked to maps to help users navigation the conference area. Conference information is updated from the network automatically.</text:p>
      <text:p text:style-name="P5"/>
      <text:p text:style-name="P7"><text:tab/>Open Mobile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Pad version of client's existing iPhone app which combines a new UI with large, existing codebase. Refactored existing codebase to better share code.</text:p>
      <text:p text:style-name="P5"/>
      <text:p text:style-name="P7"><text:soft-page-break/><text:tab/>MindSwarms video survey iPhone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ing an iPhone app for a client that records short video snippets using augmented reality controls, authenticates against client's backend, and synchronizes its local Core Data store with data and responses on the server.</text:p>
      <text:p text:style-name="P5"/>
      <text:p text:style-name="P7"><text:tab/>Spoke at 360iDev 2011: OCMock: Crash Test Dummies For Your Code<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a half-day seminar on mock objects in iOS development at 360iDev.</text:p>
      <text:p text:style-name="P5"/>
      <text:p text:style-name="P7"><text:tab/>AOPA Aviation Summit Conference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universal iPad/iPhone app with news and Twitter feeds for the annual summit of the Aircraft Owner's and Pilot Association.</text:p>
      <text:p text:style-name="P5"/>
      <text:p text:style-name="P7"><text:tab/>Spoke at CocoaConf 2011: Test Driven Development in the iOS World<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sessions on using TDD techniques in iOS development at CocoaConf.</text:p>
      <text:p text:style-name="P5"/>
      <text:p text:style-name="P7"><text:tab/>Form builder component for iPad medical records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to dynamically generate data entry forms based on templates downloaded from a server, allow user to enter data and submit it back to the server.</text:p>
      <text:p text:style-name="P5"/>
      <text:p text:style-name="P7"><text:tab/>iOS framework to embed quizzes into training apps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to build a bank of questions, videos, and images that can be integrated into an app, allowing the user to test their understanding of the material.</text:p>
      <text:p text:style-name="P5"/>
      <text:p text:style-name="P7"><text:tab/>iOS framework to integrate LineaPro SDK with UIWebView (2010)<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framework to integrate LineaPRO barcode and magnetic card reader with UIWebView. <text:s/>The client uses it to access the device without writing Objective-C code.</text:p>
      <text:p text:style-name="P5"/>
      <text:p text:style-name="P7"><text:tab/>Recycling and manufacturing tracking system (2006-pres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Primary architect and lead developer for a multi-tier, distributed Java-based system to support a major recycling line of business for a manufacturing client.</text:p>
      <text:p text:style-name="P5"/>
      <text:p text:style-name="P8"><text:span text:style-name="T2"><text:tab/></text:span><text:span text:style-name="T3">DoD and DARPA projects researcher and developer (2003-2007) </text:span><text:toc-mark text:string-value="System Analysis for a multi-tier, DII-COE system (2001) " text:outline-level="4"/><text:span text:style-name="T3"/></text:p>
      <text:p text:style-name="P10">Various planning <text:s/>and intelligent agent systems. </text:p>
      <text:p text:style-name="P17"/>
      <text:p text:style-name="P8"><text:span text:style-name="T2"><text:tab/></text:span><text:span text:style-name="T3">Adjunct Instructor for various university computer courses (1982-2006) </text:span></text:p>
      <text:p text:style-name="P15">Development experience <text:toc-mark text:string-value="Design experience " text:outline-level="3"/></text:p>
      <text:p text:style-name="P13">iPhone, iPad, and iOS development<text:tab/><text:tab/><text:tab/><text:tab/>3 years</text:p>
      <text:p text:style-name="P13">Other mobile systems design and development<text:tab/><text:tab/><text:tab/>4 years</text:p>
      <text:p text:style-name="P13">Java Desktop and Enterprise design and development<text:tab/><text:tab/>10+ years</text:p>
      <text:p text:style-name="P13">Multitier, distributed systems design and development<text:tab/><text:tab/>20+ years</text:p>
      <text:p text:style-name="P13">Overall professional development experience<text:tab/><text:tab/><text:tab/>30+ years</text:p>
      <text:p text:style-name="P14"/>
      <text:p text:style-name="P4">Selected Language and Tool experience <text:toc-mark text:string-value="Languages and Tools experience " text:outline-level="3"/><text:toc-mark text:string-value="Languages and Tools experience " text:outline-level="3"/></text:p>
      <text:p text:style-name="P13">Mobile: iOS, Android, J2ME, WinCE</text:p>
      <text:p text:style-name="P13">Languages: Objective-C, Java, C/C++, Delphi</text:p>
      <text:p text:style-name="P2"/>
      <text:p text:style-name="P4">Work Experience <text:toc-mark text:string-value="Work Experience " text:outline-level="3"/></text:p>
      <text:p text:style-name="P16">Independent<text:tab/><text:tab/>1998-present<text:tab/>Independent software craftsman</text:p>
      <text:p text:style-name="P9">Synergy, Inc.<text:tab/><text:tab/>1996‑1998<text:tab/>Software design and development</text:p>
      <text:p text:style-name="P9">Rotman &amp; Sjoquist<text:tab/>1988-1996<text:tab/>Extensive consulting and programming in a partnership</text:p>
      <text:p text:style-name="P9">Cedarville College<text:tab/>1982‑1996<text:tab/>Various roles ending with Asst. Dir. of Computer Services</text:p>
      <text:p text:style-name="P9"><text:tab/><text:tab/><text:tab/><text:tab/><text:tab/>Adjunct Instructor, computer language courses</text:p>
      <text:p text:style-name="P9">Independent<text:tab/><text:tab/>1980-1988<text:tab/>Custom software development for various businesses.</text:p>
      <text:p text:style-name="P2"/>
      <text:p text:style-name="P4">Education <text:toc-mark text:string-value="Education " text:outline-level="3"/></text:p>
      <text:p text:style-name="P11">B.A. Business Administration, Cedarville College, June 1982</text:p>
      <text:p text:style-name="P11">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June 2012</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1$Unix OpenOffice.org_project/Patch 0</meta:generator>
    <dc:title>Douglas W</dc:title>
    <meta:initial-creator>Douglas W Sjoquist</meta:initial-creator>
    <meta:creation-date>2006-05-12T21:25:00</meta:creation-date>
    <dc:date>2012-06-18T16:09:19</dc:date>
    <dc:language>en-US</dc:language>
    <meta:editing-cycles>57</meta:editing-cycles>
    <meta:editing-duration>PT06H49M45S</meta:editing-duration>
    <meta:print-date>2011-11-03T17:08:36</meta:print-date>
    <meta:document-statistic meta:table-count="0" meta:image-count="0" meta:object-count="0" meta:page-count="3" meta:paragraph-count="55" meta:word-count="715" meta:character-count="4556"/>
    <meta:user-defined meta:name="Info 1"/>
    <meta:user-defined meta:name="Info 2"/>
    <meta:user-defined meta:name="Info 3"/>
    <meta:user-defined meta:name="Info 4"/>
  </office:meta>
</office:document-meta>
</file>