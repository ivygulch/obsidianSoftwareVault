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733cb" style:font-size-asian="12pt" style:font-weight-asian="bold" style:font-size-complex="12pt" style:font-weight-complex="bold"/>
    </style:style>
    <style:style style:name="P10"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1"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officeooo:paragraph-rsid="0017a673" style:font-size-asian="12pt" style:font-weight-asian="bold" style:font-size-complex="12pt" style:font-weight-complex="bold"/>
    </style:style>
    <style:style style:name="P1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3"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14"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5" style:family="paragraph" style:parent-style-name="_32_Definitions">
      <style:paragraph-properties fo:text-align="start" style:justify-single-word="false"/>
    </style:style>
    <style:style style:name="P16" style:family="paragraph" style:parent-style-name="_32_Definitions">
      <style:paragraph-properties fo:text-align="start" style:justify-single-word="false"/>
      <style:text-properties officeooo:paragraph-rsid="001733cb"/>
    </style:style>
    <style:style style:name="P17" style:family="paragraph" style:parent-style-name="_32_Definitions">
      <style:paragraph-properties fo:text-align="start" style:justify-single-word="false"/>
      <style:text-properties officeooo:paragraph-rsid="0017a673"/>
    </style:style>
    <style:style style:name="P18" style:family="paragraph" style:parent-style-name="_32_Definitions">
      <style:paragraph-properties fo:text-align="start" style:justify-single-word="false"/>
      <style:text-properties officeooo:paragraph-rsid="00148e97"/>
    </style:style>
    <style:style style:name="P19" style:family="paragraph" style:parent-style-name="_32_Definitions">
      <style:paragraph-properties fo:line-height="100%" fo:text-align="start" style:justify-single-word="false"/>
    </style:style>
    <style:style style:name="P20"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22"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2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paragraph-rsid="0017197b"/>
    </style:style>
    <style:style style:name="P2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25"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26" style:family="paragraph" style:parent-style-name="Standard" style:master-page-name="Standard">
      <style:paragraph-properties style:page-number="auto">
        <style:tab-stops>
          <style:tab-stop style:position="6.5in" style:type="right"/>
        </style:tab-stops>
      </style:paragraph-properties>
    </style:style>
    <style:style style:name="P27"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7a673"/>
    </style:style>
    <style:style style:name="T5" style:family="text">
      <style:text-properties officeooo:rsid="001733cb"/>
    </style:style>
    <style:style style:name="T6" style:family="text">
      <style:text-properties officeooo:rsid="0017197b"/>
    </style:style>
    <style:style style:name="T7" style:family="text">
      <style:text-properties officeooo:rsid="00148e97"/>
    </style:style>
    <style:style style:name="T8" style:family="text">
      <style:text-properties officeooo:rsid="00159688"/>
    </style:style>
    <style:style style:name="T9" style:family="text">
      <style:text-properties officeooo:rsid="001985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ummary <text:toc-mark text:string-value="Summary " text:outline-level="3"/></text:p>
      <text:p text:style-name="P5"/>
      <text:p text:style-name="P15">Experienced software craftsman with a <text:span text:style-name="T4">wide variety of experience across industries, markets, and tools. Specializing </text:span>in iOS and <text:span text:style-name="T6">reactive </text:span>system design and development.</text:p>
      <text:p text:style-name="P5"/>
      <text:p text:style-name="P15">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20"/>
      <text:p text:style-name="P3">Selected Experience<text:toc-mark text:string-value="Project Experience " text:outline-level="3"/></text:p>
      <text:p text:style-name="P5"/>
      <text:p text:style-name="P9"><text:tab/><text:span text:style-name="T5">Walmart App </text:span>(<text:span text:style-name="T5">2020-present)</text:span></text:p>
      <text:p text:style-name="P16">Working with <text:span text:style-name="T5">Walmart Labs </text:span>team on <text:span text:style-name="T5">new </text:span>iOS <text:span text:style-name="T6">eCommerce app built on a reactive, plug-in style </text:span>architecture using <text:span text:style-name="T5">Combine.</text:span></text:p>
      <text:p text:style-name="P9"><text:tab/><text:span text:style-name="T7">Sam's Club </text:span>App (201<text:span text:style-name="T7">7</text:span>-<text:span text:style-name="T6">2020</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6">Work<text:span text:style-name="T9">ed</text:span> with <text:span text:style-name="T7">Sam's Club </text:span>team on iOS <text:span text:style-name="T6">eCommerce app</text:span>. <text:span text:style-name="T6">Converted app to use </text:span>RxSwift<text:span text:style-name="T7">, prepared it to move to Combine frameworks.</text:span></text:p>
      <text:p text:style-name="P9"><text:tab/>ASDA Universal App (2014-<text:span text:style-name="T7">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8">Working with Walmart Labs team on iOS app for their UK subsidiary, ASDA. Convert<text:span text:style-name="T9">ed </text:span>app to <text:span text:style-name="T9">use </text:span>RxSwift: rewr<text:span text:style-name="T9">ote</text:span> legacy components and <text:span text:style-name="T9">wrote </text:span>new modules.</text:p>
      <text:p text:style-name="P10"/>
      <text:p text:style-name="P7"><text:tab/>Custom <text:span text:style-name="T9">iPad</text:span> App for Physical Therapists (2016-<text:span text:style-name="T8">2019</text:span>)</text:p>
      <text:p text:style-name="P17">Develop<text:span text:style-name="T9">ed</text:span> medical app to develop individual treatment and exercises plans for physical rehabilitation patients, <text:span text:style-name="T9">using Realm to</text:span> <text:span text:style-name="T9">s</text:span>ynchroniz<text:span text:style-name="T9">aton multiple devices.</text:span></text:p>
      <text:p text:style-name="P11"/>
      <text:p text:style-name="P8"><text:tab/><text:span text:style-name="T9">Custom iOS apps development and maintenance for clients </text:span>(<text:span text:style-name="T7">iOS</text:span>, <text:span text:style-name="T7">2010-2019</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3"><text:span text:style-name="T2"><text:tab/></text:span><text:span text:style-name="T3">DoD and DARPA projects researcher and developer (2003-2007) </text:span><text:toc-mark text:string-value="System Analysis for a multi-tier, DII-COE system (2001) " text:outline-level="4"/></text:p>
      <text:p text:style-name="P12"><text:span text:style-name="T2"><text:tab/></text:span><text:span text:style-name="T3">Adjunct Instructor for various university computer courses (1982-2006) </text:span></text:p>
      <text:p text:style-name="P21">Development Experience <text:toc-mark text:string-value="Design experience " text:outline-level="3"/></text:p>
      <text:p text:style-name="P23">iPhone, iPad, and iOS development<text:tab/><text:tab/><text:tab/><text:tab/><text:span text:style-name="T7">10</text:span>+ years</text:p>
      <text:p text:style-name="P23"><text:span text:style-name="T6">Reactive architecture design and</text:span> development<text:tab/><text:tab/><text:tab/><text:span text:style-name="T6">5</text:span>+ years</text:p>
      <text:p text:style-name="P23">Other mobile systems design and development<text:tab/><text:tab/><text:tab/>8+ years</text:p>
      <text:p text:style-name="P23">Java Desktop and Enterprise design and development<text:tab/><text:tab/>15+ years</text:p>
      <text:p text:style-name="P22">Multi-tier, distributed systems design and development<text:tab/><text:tab/>30+ years</text:p>
      <text:p text:style-name="P22">Overall professional development experience<text:tab/><text:tab/><text:tab/><text:span text:style-name="T7">40</text:span> years</text:p>
      <text:p text:style-name="P24"/>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22">Various conference sessions 2011-2014 (CocoaConf, 360iDev, D2Cincinnati)</text:p>
      <text:p text:style-name="P22">Regular presenter at CocoaHeads (Columbus, Cincinnati, Cleveland, Indianapolis)</text:p>
      <text:p text:style-name="P22">Co-organizer of Cincinnati CocoaDev</text:p>
      <text:p text:style-name="P22">Adjunct instructor, programming courses (Cedarville 1982-2006)</text:p>
      <text:p text:style-name="P24"/>
      <text:p text:style-name="P4">Work Experience <text:toc-mark text:string-value="Work Experience " text:outline-level="3"/><text:toc-mark text:string-value="Work Experience " text:outline-level="3"/></text:p>
      <text:p text:style-name="P25">Independent<text:tab/><text:tab/>1998-present<text:tab/>Independent software craftsman</text:p>
      <text:p text:style-name="P14">Synergy, Inc.<text:tab/><text:tab/>1996‑1998<text:tab/>Software design and development</text:p>
      <text:p text:style-name="P14">Rotman &amp; Sjoquist<text:tab/>1988-1996<text:tab/>Extensive consulting and programming in a partnership</text:p>
      <text:p text:style-name="P14">Cedarville College<text:tab/>1982‑1996<text:tab/>Various roles ending with Asst. Dir. of Computer Services</text:p>
      <text:p text:style-name="P14"><text:tab/><text:tab/><text:tab/><text:tab/><text:tab/>Adjunct Instructor, computer language courses</text:p>
      <text:p text:style-name="P14">Independent<text:tab/><text:tab/>1980-1988<text:tab/>Custom software development for various businesses.</text:p>
      <text:p text:style-name="P2"/>
      <text:p text:style-name="P4">Education <text:toc-mark text:string-value="Education " text:outline-level="3"/></text:p>
      <text:p text:style-name="P19">B.A. Business Administration, Cedarville College, June 1982</text:p>
      <text:p text:style-name="P19">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style style:name="MT3" style:family="text">
      <style:text-properties officeooo:rsid="0017a673"/>
    </style:style>
    <style:style style:name="MT4" style:family="text">
      <style:text-properties officeooo:rsid="001733c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span text:style-name="MT1"><text:tab/></text:span><text:span text:style-name="MT2">www.sunetos.com</text:span></text:p>
        <text:p text:style-name="MP2"><text:span text:style-name="MT3">March</text:span> 202<text:span text:style-name="MT4">1</text:span></text:p>
      </style:header>
      <style:footer>
        <text:p text:style-name="MP3">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17.25$MacOSX_X86_64 NeoOffice_project/0</meta:generator>
    <dc:title>Douglas W</dc:title>
    <meta:initial-creator>Douglas W Sjoquist</meta:initial-creator>
    <meta:creation-date>2006-05-12T21:25:00</meta:creation-date>
    <dc:date>2021-03-18T10:19:59.595652791</dc:date>
    <dc:language>en-US</dc:language>
    <meta:editing-cycles>89</meta:editing-cycles>
    <meta:editing-duration>PT11H36M22S</meta:editing-duration>
    <meta:print-date>2011-11-03T17:08:36</meta:print-date>
    <meta:document-statistic meta:table-count="0" meta:image-count="0" meta:object-count="0" meta:page-count="2" meta:paragraph-count="41" meta:word-count="383" meta:character-count="2873" meta:non-whitespace-character-count="2497"/>
    <meta:user-defined meta:name="Info 1"/>
    <meta:user-defined meta:name="Info 2"/>
    <meta:user-defined meta:name="Info 3"/>
    <meta:user-defined meta:name="Info 4"/>
  </office:meta>
</office:document-meta>
</file>