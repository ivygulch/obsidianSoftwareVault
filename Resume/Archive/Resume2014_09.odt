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3"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4"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5" style:family="paragraph" style:parent-style-name="_32_Definitions">
      <style:paragraph-properties fo:text-align="start" style:justify-single-word="false"/>
    </style:style>
    <style:style style:name="P16"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paragraph-properties fo:line-height="0.1in"/>
      <style:text-properties fo:font-size="12pt" fo:font-weight="bold" style:font-size-asian="12pt" style:font-weight-asian="bold" style:font-size-complex="12pt" style:font-weight-complex="bold"/>
    </style:style>
    <style:style style:name="P2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3" style:family="paragraph" style:parent-style-name="Standard">
      <style:paragraph-properties fo:line-height="0.1in" fo:break-before="page"/>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6"/>
      <text:p text:style-name="P3">Selected Project and Speaking Experience<text:toc-mark text:string-value="Project Experience " text:outline-level="3"/></text:p>
      <text:p text:style-name="P5"/>
      <text:p text:style-name="P7"><text:tab/>ASDA Universal App (2014-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Working with the Walmart Labs team responsible for Walmart’s UK subsidiary ASDAs iOS app to add new features to iPhone version, then enhancing it to be a universal app.</text:p>
      <text:p text:style-name="P21"/>
      <text:p text:style-name="P7"><text:tab/>Conference speaking engagements 2014</text:p>
      <text:p text:style-name="P10">D2Cincinnati: “Building a Stronger Customer Experience on Apple’s Latest”</text:p>
      <text:p text:style-name="P10">CocoaConf Columbus: “Brainstorming Creative Uses of iOS 8 Extensions”</text:p>
      <text:p text:style-name="P5"/>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teractive sales tool as part of client’s sales and marketing campaign for a very large scale development project</text:p>
      <text:p text:style-name="P21"/>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OS app and backend for a client's employee training business. It manages 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pp for a client so their customers can track medically significant events which they can share with medical provider to receive advice and therapy alternatives.</text:p>
      <text:p text:style-name="P5"/>
      <text:p text:style-name="P23"/>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for a suite of medical apps. Helped client design backend API for synchronization, assisted with data security and system architecture.</text:p>
      <text:p text:style-name="P5"/>
      <text:p text:style-name="P7"><text:tab/>Spoke at CocoaConf (DC, Dallas, Columbus 2013)</text:p>
      <text:p text:style-name="P10">Gave various technical and project management sessions for developers.</text:p>
      <text:p text:style-name="P5"/>
      <text:p text:style-name="P7"><text:tab/>EAA AirVenture, SUN 'n FUN, WAI Conference apps (2011-2013)</text:p>
      <text:p text:style-name="P10">Developed conference app framework to be configurable without requiring coding changes, changed the style of the app to use slide out menus and custom submodules to handle different content types. </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8"><text:span text:style-name="T2"><text:tab/></text:span><text:span text:style-name="T3">Adjunct Instructor for various university computer courses (1982-2006) </text:span></text:p>
      <text:p text:style-name="P13">Development experience <text:toc-mark text:string-value="Design experience " text:outline-level="3"/></text:p>
      <text:p text:style-name="P12">iPhone, iPad, and iOS development<text:tab/><text:tab/><text:tab/><text:tab/>5+ years</text:p>
      <text:p text:style-name="P12">Other mobile systems design and development<text:tab/><text:tab/><text:tab/>5+ years</text:p>
      <text:p text:style-name="P12">Java Desktop and Enterprise design and development<text:tab/><text:tab/>15+ years</text:p>
      <text:p text:style-name="P12">Multi-tier, distributed systems design and development<text:tab/><text:tab/>25+ years</text:p>
      <text:p text:style-name="P12">Overall professional development experience<text:tab/><text:tab/><text:tab/>30+ years</text:p>
      <text:p text:style-name="P17"/>
      <text:p text:style-name="P4">Work Experience <text:toc-mark text:string-value="Work Experience " text:outline-level="3"/></text:p>
      <text:p text:style-name="P14">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September 2014</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2014.2$Unix OpenOffice.org_project/</meta:generator>
    <dc:title>Douglas W</dc:title>
    <meta:initial-creator>Douglas W Sjoquist</meta:initial-creator>
    <meta:creation-date>2006-05-12T21:25:00</meta:creation-date>
    <dc:date>2014-09-26T14:47:56</dc:date>
    <dc:language>en-US</dc:language>
    <meta:editing-cycles>72</meta:editing-cycles>
    <meta:editing-duration>PT09H36M07S</meta:editing-duration>
    <meta:print-date>2011-11-03T17:08:36</meta:print-date>
    <meta:document-statistic meta:table-count="0" meta:image-count="0" meta:object-count="0" meta:page-count="3" meta:paragraph-count="51" meta:word-count="693" meta:character-count="4161"/>
    <meta:user-defined meta:name="Info 1"/>
    <meta:user-defined meta:name="Info 2"/>
    <meta:user-defined meta:name="Info 3"/>
    <meta:user-defined meta:name="Info 4"/>
  </office:meta>
</office:document-meta>
</file>