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0"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1" style:family="paragraph" style:parent-style-name="_32_Definitions">
      <style:paragraph-properties fo:text-align="start" style:justify-single-word="false"/>
    </style:style>
    <style:style style:name="P12" style:family="paragraph" style:parent-style-name="_32_Definitions">
      <style:paragraph-properties fo:line-height="100%" fo:text-align="start" style:justify-single-word="false"/>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6"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24"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style>
    <style:style style:name="T6" style:family="text">
      <style:text-properties style:font-size-asian="12pt"/>
    </style:style>
    <style:style style:name="T7" style:family="text">
      <style:text-properties style:font-weight-asian="bold"/>
    </style:style>
    <style:style style:name="T8" style:family="text">
      <style:text-properties style:font-size-complex="12pt"/>
    </style:style>
    <style:style style:name="T9"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1">Experienced software craftsman with a strong background in iOS and distributed system design and development.</text:p>
      <text:p text:style-name="P5"/>
      <text:p text:style-name="P11">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4"> </text:span>Able to mentor and assist development team members in developing their skills.</text:p>
      <text:p text:style-name="P13"/>
      <text:p text:style-name="P3">Selected Experience<text:toc-mark text:string-value="Project Experience " text:outline-level="3"/></text:p>
      <text:p text:style-name="P5"/>
      <text:p text:style-name="P7"><text:tab/>ASDA Universal App (2014-pres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Working with Walmart Labs team responsible for iOS app for their UK subsidiary, ASDA. Refactoring, new features, increased test coverage. Currently converting the app to use Swift and a new reactive architecture using RxSwift.</text:p>
      <text:p text:style-name="P8"/>
      <text:p text:style-name="P7"><text:tab/>Generator Control and Status App (2016-present)</text:p>
      <text:p text:style-name="P11">Developing new app for consumers to monitor and control a home gas-powered generator via Bluetooth.</text:p>
      <text:p text:style-name="P8"/>
      <text:p text:style-name="P7"><text:tab/>Custom Universal App (2016-present)</text:p>
      <text:p text:style-name="P11">Developing new medical app for therapists to develop individual treatment and exercises plans for physical rehabilitation patients.</text:p>
      <text:p text:style-name="P8"/>
      <text:p text:style-name="P7"><text:tab/>Client app maintenance (2010-present)</text:p>
      <text:p text:style-name="P11">On-going work with various clients to maintain and update existing apps.</text:p>
      <text:p text:style-name="P8"/>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teractive sales tool for a client's very large construction project.</text:p>
      <text:p text:style-name="P8"/>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OS app and backend for a client's employee training business. It manages videos, assessments, and tracking and is built on Microsoft’s Azure cloud services.</text:p>
      <text:p text:style-name="P5"><text:soft-page-break/></text:p>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pp for a client so their customers can track medically significant events which they can share with medical provider to receive advice and therapy alternatives.</text:p>
      <text:p text:style-name="P5"/>
      <text:p text:style-name="P9"><text:span text:style-name="T4"><text:tab/>MedSnap ID – Medical app for prescription and drug identification (2012-2013)</text:span><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p>
      <text:p text:style-name="P11">Developed data synchronization for a suite of medical apps. Helped client design backend API for synchronization, assisted with data security and system architecture.</text:p>
      <text:p text:style-name="P5"/>
      <text:p text:style-name="P7"><text:tab/>EAA AirVenture, SUN 'n FUN, WAI Conference apps (2011-2013)</text:p>
      <text:p text:style-name="P11">Developed conference app framework to be configurable without requiring coding changes, changed the style of the app to use slide out menus and custom submodules to handle different content types. </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Developed a framework to dynamically generate data entry forms based on templates downloaded from a server, allow user to enter data and submit it back to the server.</text:p>
      <text:p text:style-name="P5"/>
      <text:p text:style-name="P8"/>
      <text:p text:style-name="P7"><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text:span text:style-name="T3"><text:tab/></text:span><text:span text:style-name="T4">DoD and DARPA projects researcher and developer (2003-2007) </text:span><text:toc-mark text:string-value="System Analysis for a multi-tier, DII-COE system (2001) " text:outline-level="4"/><text:span text:style-name="T4"/></text:p>
      <text:p text:style-name="P9"><text:span text:style-name="T3"><text:tab/></text:span><text:span text:style-name="T4">Adjunct Instructor for various university computer courses (1982-2006) </text:span></text:p>
      <text:p text:style-name="P14">Development Experience <text:toc-mark text:string-value="Design experience " text:outline-level="3"/></text:p>
      <text:p text:style-name="P15">iPhone, iPad, and iOS development<text:tab/><text:tab/><text:tab/><text:tab/>7+ years</text:p>
      <text:p text:style-name="P15">Other mobile systems design and development<text:tab/><text:tab/><text:tab/>7+ years</text:p>
      <text:p text:style-name="P15">Java Desktop and Enterprise design and development<text:tab/><text:tab/>15+ years</text:p>
      <text:p text:style-name="P15">Multi-tier, distributed systems design and development<text:tab/><text:tab/>25+ years</text:p>
      <text:p text:style-name="P15">Overall professional development experience<text:tab/><text:tab/><text:tab/>30+ years</text:p>
      <text:p text:style-name="P16"/>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15">CocoaConf sessions (Columbus 2011-2014, Dallas 2013, DC 2013)</text:p>
      <text:p text:style-name="P15">D2Cincinnati, Digital Marketing Conference (2014)</text:p>
      <text:p text:style-name="P15">CocoaHeads (Columbus, Cincinnati, Cleveland, Indianapolis)</text:p>
      <text:p text:style-name="P15">360iDev all-day tutorial (2011)</text:p>
      <text:p text:style-name="P15">Adjunct instructor, programming courses (Cedarville 1982-2006)</text:p>
      <text:p text:style-name="P16"/>
      <text:p text:style-name="P4">Work Experience <text:toc-mark text:string-value="Work Experience " text:outline-level="3"/><text:toc-mark text:string-value="Work Experience " text:outline-level="3"/></text:p>
      <text:p text:style-name="P17">Independent<text:tab/><text:tab/>1998-present<text:tab/>Independent software craftsman</text:p>
      <text:p text:style-name="P10">Synergy, Inc.<text:tab/><text:tab/>1996‑1998<text:tab/>Software design and development</text:p>
      <text:p text:style-name="P10">Rotman &amp; Sjoquist<text:tab/>1988-1996<text:tab/>Extensive consulting and programming in a partnership</text:p>
      <text:p text:style-name="P10">Cedarville College<text:tab/>1982‑1996<text:tab/>Various roles ending with Asst. Dir. of Computer Services</text:p>
      <text:p text:style-name="P10"><text:tab/><text:tab/><text:tab/><text:tab/><text:tab/>Adjunct Instructor, computer language courses</text:p>
      <text:p text:style-name="P10">Independent<text:tab/><text:tab/>1980-1988<text:tab/>Custom software development for various businesses.</text:p>
      <text:p text:style-name="P2"/>
      <text:p text:style-name="P4">Education <text:toc-mark text:string-value="Education " text:outline-level="3"/></text:p>
      <text:p text:style-name="P12">B.A. Business Administration, Cedarville College, June 1982</text:p>
      <text:p text:style-name="P12">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August 2016</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8$Unix OpenOffice.org_project/</meta:generator>
    <dc:title>Douglas W</dc:title>
    <meta:initial-creator>Douglas W Sjoquist</meta:initial-creator>
    <meta:creation-date>2006-05-12T21:25:00</meta:creation-date>
    <dc:date>2016-08-03T11:07:58</dc:date>
    <dc:language>en-US</dc:language>
    <meta:editing-cycles>77</meta:editing-cycles>
    <meta:editing-duration>PT10H30M38S</meta:editing-duration>
    <meta:print-date>2011-11-03T17:08:36</meta:print-date>
    <meta:document-statistic meta:table-count="0" meta:image-count="0" meta:object-count="0" meta:page-count="3" meta:paragraph-count="58" meta:word-count="761" meta:character-count="4598"/>
    <meta:user-defined meta:name="Info 1"/>
    <meta:user-defined meta:name="Info 2"/>
    <meta:user-defined meta:name="Info 3"/>
    <meta:user-defined meta:name="Info 4"/>
  </office:meta>
</office:document-meta>
</file>